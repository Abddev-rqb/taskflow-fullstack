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1965in" style:contextual-spacing="false"/>
    </style:style>
    <style:style style:name="P3" style:family="paragraph" style:parent-style-name="Heading_20_3">
      <style:text-properties officeooo:paragraph-rsid="000c52c3"/>
    </style:style>
    <style:style style:name="P4" style:family="paragraph" style:parent-style-name="Heading_20_3">
      <style:text-properties officeooo:paragraph-rsid="000cb7cf"/>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text-properties officeooo:paragraph-rsid="000cb7cf"/>
    </style:style>
    <style:style style:name="P7" style:family="paragraph" style:parent-style-name="Text_20_body">
      <style:text-properties officeooo:paragraph-rsid="000e7a7c"/>
    </style:style>
    <style:style style:name="T1" style:family="text">
      <style:text-properties officeooo:rsid="0005b4b4"/>
    </style:style>
    <style:style style:name="T2" style:family="text">
      <style:text-properties officeooo:rsid="0005dafb"/>
    </style:style>
    <style:style style:name="T3" style:family="text">
      <style:text-properties officeooo:rsid="0007f160"/>
    </style:style>
    <style:style style:name="T4" style:family="text">
      <style:text-properties officeooo:rsid="000982a3"/>
    </style:style>
    <style:style style:name="T5" style:family="text">
      <style:text-properties officeooo:rsid="000a98c9"/>
    </style:style>
    <style:style style:name="T6" style:family="text">
      <style:text-properties officeooo:rsid="000c52c3"/>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officeooo:rsid="000cb7cf"/>
    </style:style>
    <style:style style:name="T11" style:family="text">
      <style:text-properties fo:font-size="10.5pt" style:font-size-asian="10.5pt" style:font-size-complex="10.5pt"/>
    </style:style>
    <style:style style:name="T12" style:family="text">
      <style:text-properties officeooo:rsid="000e7a7c"/>
    </style:style>
    <style:style style:name="T13" style:family="text">
      <style:text-properties officeooo:rsid="000ec701"/>
    </style:style>
    <style:style style:name="T14" style:family="text">
      <style:text-properties officeooo:rsid="001092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askFlow Project Documentation — Setup Completed So Far</text:h>
      <text:h text:style-name="Heading_20_3" text:outline-level="3">Project Name</text:h>
      <text:p text:style-name="Text_20_body"><text:span text:style-name="Strong_20_Emphasis">TaskFlow — Full Stack Task Management Application</text:span></text:p>
      <text:h text:style-name="Heading_20_3" text:outline-level="3">Tech Stack Planned</text:h>
      <text:p text:style-name="Preformatted_20_Text"><text:span text:style-name="Source_20_Text">Backend <text:s text:c="4"/>: Python, Django, Django REST Framework</text:span></text:p>
      <text:p text:style-name="Preformatted_20_Text"><text:span text:style-name="Source_20_Text">Frontend <text:s text:c="3"/>: React.js</text:span></text:p>
      <text:p text:style-name="Preformatted_20_Text"><text:span text:style-name="Source_20_Text">Database <text:s text:c="3"/>: PostgreSQL</text:span></text:p>
      <text:p text:style-name="Preformatted_20_Text"><text:span text:style-name="Source_20_Text">Auth <text:s text:c="7"/>: JWT Authentication</text:span></text:p>
      <text:p text:style-name="Preformatted_20_Text"><text:span text:style-name="Source_20_Text">Async Jobs <text:s/>: Redis + Celery</text:span></text:p>
      <text:p text:style-name="Preformatted_20_Text"><text:span text:style-name="Source_20_Text">Deployment <text:s/>: Docker, Gunicorn, Nginx, AWS EC2, GitHub Actions</text:span></text:p>
      <text:p text:style-name="P1"><text:span text:style-name="Source_20_Text">Testing <text:s text:c="4"/>: Postman, PyTest/Unittest</text:span></text:p>
      <text:p text:style-name="Horizontal_20_Line"/>
      <text:h text:style-name="Heading_20_1" text:outline-level="1">1. System Environment Verified</text:h>
      <text:p text:style-name="Text_20_body">We first checked whether your laptop has the required tools installed.</text:p>
      <text:h text:style-name="Heading_20_3" text:outline-level="3">Installed Versions</text:h>
      <text:p text:style-name="Preformatted_20_Text"><text:span text:style-name="Source_20_Text">Python <text:s text:c="5"/>: Python 3.12.3</text:span></text:p>
      <text:p text:style-name="Preformatted_20_Text"><text:span text:style-name="Source_20_Text">Pip <text:s text:c="8"/>: pip 24.0</text:span></text:p>
      <text:p text:style-name="Preformatted_20_Text"><text:span text:style-name="Source_20_Text">Node.js <text:s text:c="4"/>: v22.22.2</text:span></text:p>
      <text:p text:style-name="Preformatted_20_Text"><text:span text:style-name="Source_20_Text">npm <text:s text:c="8"/>: 10.9.7</text:span></text:p>
      <text:p text:style-name="Preformatted_20_Text"><text:span text:style-name="Source_20_Text">Git <text:s text:c="8"/>: git version 2.43.0</text:span></text:p>
      <text:p text:style-name="Preformatted_20_Text"><text:span text:style-name="Source_20_Text">Redis <text:s text:c="6"/>: v7.0.15</text:span></text:p>
      <text:p text:style-name="P1"><text:span text:style-name="Source_20_Text">PostgreSQL <text:s/>: PostgreSQL 16.13</text:span></text:p>
      <text:h text:style-name="Heading_20_3" text:outline-level="3">Status</text:h>
      <text:p text:style-name="Text_20_body">All required versions are suitable for the project.</text:p>
      <text:p text:style-name="Text_20_body">Important note:</text:p>
      <text:p text:style-name="Preformatted_20_Text"><text:span text:style-name="Source_20_Text">Node.js and npm are already correctly installed.</text:span></text:p>
      <text:p text:style-name="P1"><text:span text:style-name="Source_20_Text">We should not reinstall npm separately because Node.js 22 from NodeSource already includes npm.</text:span></text:p>
      <text:p text:style-name="Horizontal_20_Line"/>
      <text:h text:style-name="Heading_20_1" text:outline-level="1"/>
      <text:p text:style-name="Text_20_body"/>
      <text:p text:style-name="Text_20_body"/>
      <text:p text:style-name="Text_20_body"/>
      <text:p text:style-name="Text_20_body"/>
      <text:p text:style-name="Text_20_body"/>
      <text:h text:style-name="Heading_20_1" text:outline-level="1"><text:soft-page-break/>2. Project Folder Created</text:h>
      <text:p text:style-name="Text_20_body">We created the main project folder:</text:p>
      <text:p text:style-name="P1"><text:span text:style-name="Source_20_Text">~/taskflow</text:span></text:p>
      <text:p text:style-name="Text_20_body">Inside it, we created three main folders:</text:p>
      <text:p text:style-name="Preformatted_20_Text"><text:span text:style-name="Source_20_Text">taskflow/</text:span></text:p>
      <text:p text:style-name="Preformatted_20_Text"><text:span text:style-name="Source_20_Text">│</text:span></text:p>
      <text:p text:style-name="Preformatted_20_Text"><text:span text:style-name="Source_20_Text">├── backend/</text:span></text:p>
      <text:p text:style-name="Preformatted_20_Text"><text:span text:style-name="Source_20_Text">├── frontend/</text:span></text:p>
      <text:p text:style-name="P1"><text:span text:style-name="Source_20_Text">└── nginx/</text:span></text:p>
      <text:h text:style-name="Heading_20_3" text:outline-level="3">Purpose of Each Folder</text:h>
      <text:p text:style-name="Preformatted_20_Text"><text:span text:style-name="Source_20_Text">backend/ <text:s text:c="2"/>: Django REST Framework backend code</text:span></text:p>
      <text:p text:style-name="Preformatted_20_Text"><text:span text:style-name="Source_20_Text">frontend/ <text:s/>: React.js frontend application</text:span></text:p>
      <text:p text:style-name="P1"><text:span text:style-name="Source_20_Text">nginx/ <text:s text:c="4"/>: Nginx configuration for deployment</text:span></text:p>
      <text:p text:style-name="Horizontal_20_Line"/>
      <text:h text:style-name="Heading_20_1" text:outline-level="1">3. Backend Virtual Environment Created</text:h>
      <text:p text:style-name="Text_20_body">Inside the backend folder, we created a Python virtual environment:</text:p>
      <text:p text:style-name="Preformatted_20_Text"><text:span text:style-name="Source_20_Text">cd ~/taskflow/backend</text:span></text:p>
      <text:p text:style-name="P1"><text:span text:style-name="Source_20_Text">python3 -m venv venv</text:span></text:p>
      <text:p text:style-name="Text_20_body">Then activated it:</text:p>
      <text:p text:style-name="P1"><text:span text:style-name="Source_20_Text">source venv/bin/activate</text:span></text:p>
      <text:p text:style-name="Text_20_body">After activation, the terminal showed:</text:p>
      <text:p text:style-name="P1"><text:span text:style-name="Source_20_Text">(venv)</text:span></text:p>
      <text:h text:style-name="Heading_20_3" text:outline-level="3">Why We Created a Virtual Environment</text:h>
      <text:p text:style-name="Text_20_body">The virtual environment keeps this project’s Python packages separate from the system Python.</text:p>
      <text:p text:style-name="Text_20_body">This prevents version conflicts and makes the project cleaner.</text:p>
      <text:p text:style-name="Horizontal_20_Line"/>
      <text:h text:style-name="Heading_20_1" text:outline-level="1">4. Pip Upgraded Inside Virtual Environment</text:h>
      <text:p text:style-name="Text_20_body">We upgraded pip inside the virtual environment:</text:p>
      <text:p text:style-name="P1"><text:span text:style-name="Source_20_Text">pip install --upgrade pip</text:span></text:p>
      <text:h text:style-name="Heading_20_3" text:outline-level="3">Purpose</text:h>
      <text:p text:style-name="Text_20_body">This ensures package installation works smoothly and avoids old pip-related dependency issues.</text:p>
      <text:p text:style-name="Horizontal_20_Line"/>
      <text:h text:style-name="Heading_20_1" text:outline-level="1"><text:soft-page-break/>5. Backend Packages Installed</text:h>
      <text:p text:style-name="Text_20_body">We installed all backend dependencies:</text:p>
      <text:p text:style-name="P1"><text:span text:style-name="Source_20_Text">pip install django djangorestframework djangorestframework-simplejwt psycopg2-binary django-cors-headers celery redis python-decouple pytest pytest-django gunicorn</text:span></text:p>
      <text:h text:style-name="Heading_20_3" text:outline-level="3">Package Purpose</text:h>
      <text:p text:style-name="Preformatted_20_Text"><text:span text:style-name="Source_20_Text">django <text:s text:c="24"/>: Main backend framework</text:span></text:p>
      <text:p text:style-name="Preformatted_20_Text"><text:span text:style-name="Source_20_Text">djangorestframework <text:s text:c="11"/>: For building REST APIs</text:span></text:p>
      <text:p text:style-name="Preformatted_20_Text"><text:span text:style-name="Source_20_Text">djangorestframework-simplejwt <text:s/>: JWT authentication</text:span></text:p>
      <text:p text:style-name="Preformatted_20_Text"><text:span text:style-name="Source_20_Text">psycopg2-binary <text:s text:c="15"/>: PostgreSQL database connector</text:span></text:p>
      <text:p text:style-name="Preformatted_20_Text"><text:span text:style-name="Source_20_Text">django-cors-headers <text:s text:c="11"/>: Allows React frontend to call backend APIs</text:span></text:p>
      <text:p text:style-name="Preformatted_20_Text"><text:span text:style-name="Source_20_Text">celery <text:s text:c="24"/>: Background task processing</text:span></text:p>
      <text:p text:style-name="Preformatted_20_Text"><text:span text:style-name="Source_20_Text">redis <text:s text:c="25"/>: Message broker for Celery</text:span></text:p>
      <text:p text:style-name="Preformatted_20_Text"><text:span text:style-name="Source_20_Text">python-decouple <text:s text:c="15"/>: Environment variable management</text:span></text:p>
      <text:p text:style-name="Preformatted_20_Text"><text:span text:style-name="Source_20_Text">pytest <text:s text:c="24"/>: Testing framework</text:span></text:p>
      <text:p text:style-name="Preformatted_20_Text"><text:span text:style-name="Source_20_Text">pytest-django <text:s text:c="17"/>: Django support for pytest</text:span></text:p>
      <text:p text:style-name="P1"><text:span text:style-name="Source_20_Text">gunicorn <text:s text:c="22"/>: Production WSGI server</text:span></text:p>
      <text:p text:style-name="Horizontal_20_Line"/>
      <text:h text:style-name="Heading_20_1" text:outline-level="1">6. Requirements File Created</text:h>
      <text:p text:style-name="Text_20_body">We generated the dependency file:</text:p>
      <text:p text:style-name="P1"><text:span text:style-name="Source_20_Text">pip freeze &gt; requirements.txt</text:span></text:p>
      <text:p text:style-name="Text_20_body">This created:</text:p>
      <text:p text:style-name="P1"><text:span text:style-name="Source_20_Text">requirements.txt</text:span></text:p>
      <text:h text:style-name="Heading_20_3" text:outline-level="3">Purpose</text:h>
      <text:p text:style-name="Text_20_body">The <text:span text:style-name="Source_20_Text">requirements.txt</text:span> file stores all backend package versions.</text:p>
      <text:p text:style-name="Text_20_body">Later, anyone can install the same dependencies using:</text:p>
      <text:p text:style-name="P1"><text:span text:style-name="Source_20_Text">pip install -r requirements.txt</text:span></text:p>
      <text:p text:style-name="Text_20_body">This is important for:</text:p>
      <text:p text:style-name="Preformatted_20_Text"><text:span text:style-name="Source_20_Text">GitHub repository</text:span></text:p>
      <text:p text:style-name="Preformatted_20_Text"><text:span text:style-name="Source_20_Text">Deployment</text:span></text:p>
      <text:p text:style-name="Preformatted_20_Text"><text:span text:style-name="Source_20_Text">Docker setup</text:span></text:p>
      <text:p text:style-name="Preformatted_20_Text"><text:span text:style-name="Source_20_Text">Team collaboration</text:span></text:p>
      <text:p text:style-name="P1"><text:span text:style-name="Source_20_Text">Project reproducibility</text:span></text:p>
      <text:p text:style-name="Horizontal_20_Line"/>
      <text:p text:style-name="Text_20_body"/>
      <text:h text:style-name="Heading_20_1" text:outline-level="1"><text:soft-page-break/>7. Django Backend Project Created</text:h>
      <text:p text:style-name="Text_20_body">Inside:</text:p>
      <text:p text:style-name="P1"><text:span text:style-name="Source_20_Text">~/taskflow/backend</text:span></text:p>
      <text:p text:style-name="Text_20_body">We created the Django project:</text:p>
      <text:p text:style-name="P1"><text:span text:style-name="Source_20_Text">django-admin startproject taskflow_backend .</text:span></text:p>
      <text:p text:style-name="Text_20_body">This created the main backend configuration folder:</text:p>
      <text:p text:style-name="P1"><text:span text:style-name="Source_20_Text">taskflow_backend/</text:span></text:p>
      <text:p text:style-name="Text_20_body">And also created:</text:p>
      <text:p text:style-name="P1"><text:span text:style-name="Source_20_Text">manage.py</text:span></text:p>
      <text:h text:style-name="Heading_20_3" text:outline-level="3">Purpose</text:h>
      <text:p text:style-name="Preformatted_20_Text"><text:span text:style-name="Source_20_Text">taskflow_backend/ <text:s/>: Main Django project settings and configuration</text:span></text:p>
      <text:p text:style-name="P1"><text:span text:style-name="Source_20_Text">manage.py <text:s text:c="9"/>: Django command-line utility</text:span></text:p>
      <text:p text:style-name="Horizontal_20_Line"/>
      <text:h text:style-name="Heading_20_1" text:outline-level="1">8. Django Apps Created</text:h>
      <text:p text:style-name="Text_20_body">We created three Django apps:</text:p>
      <text:p text:style-name="Preformatted_20_Text"><text:span text:style-name="Source_20_Text">python manage.py startapp accounts</text:span></text:p>
      <text:p text:style-name="Preformatted_20_Text"><text:span text:style-name="Source_20_Text">python manage.py startapp tasks</text:span></text:p>
      <text:p text:style-name="P1"><text:span text:style-name="Source_20_Text">python manage.py startapp dashboard</text:span></text:p>
      <text:h text:style-name="Heading_20_3" text:outline-level="3">Current Backend Structure</text:h>
      <text:p text:style-name="Preformatted_20_Text"><text:span text:style-name="Source_20_Text">backend/</text:span></text:p>
      <text:p text:style-name="Preformatted_20_Text"><text:span text:style-name="Source_20_Text">│</text:span></text:p>
      <text:p text:style-name="Preformatted_20_Text"><text:span text:style-name="Source_20_Text">├── accounts/</text:span></text:p>
      <text:p text:style-name="Preformatted_20_Text"><text:span text:style-name="Source_20_Text">├── dashboard/</text:span></text:p>
      <text:p text:style-name="Preformatted_20_Text"><text:span text:style-name="Source_20_Text">├── taskflow_backend/</text:span></text:p>
      <text:p text:style-name="Preformatted_20_Text"><text:span text:style-name="Source_20_Text">├── tasks/</text:span></text:p>
      <text:p text:style-name="Preformatted_20_Text"><text:span text:style-name="Source_20_Text">├── venv/</text:span></text:p>
      <text:p text:style-name="Preformatted_20_Text"><text:span text:style-name="Source_20_Text">├── manage.py</text:span></text:p>
      <text:p text:style-name="P1"><text:span text:style-name="Source_20_Text">└── requirements.txt</text:span></text:p>
      <text:p text:style-name="Horizontal_20_Line"/>
      <text:p text:style-name="Text_20_body"/>
      <text:p text:style-name="Text_20_body"/>
      <text:p text:style-name="Text_20_body"/>
      <text:h text:style-name="Heading_20_1" text:outline-level="1"><text:soft-page-break/>9. Purpose of Each Django App</text:h>
      <text:h text:style-name="Heading_20_2" text:outline-level="2">accounts app</text:h>
      <text:p text:style-name="Text_20_body">This app will handle:</text:p>
      <text:p text:style-name="Preformatted_20_Text"><text:span text:style-name="Source_20_Text">Custom user model</text:span></text:p>
      <text:p text:style-name="Preformatted_20_Text"><text:span text:style-name="Source_20_Text">Admin/User roles</text:span></text:p>
      <text:p text:style-name="Preformatted_20_Text"><text:span text:style-name="Source_20_Text">JWT login</text:span></text:p>
      <text:p text:style-name="Preformatted_20_Text"><text:span text:style-name="Source_20_Text">User registration</text:span></text:p>
      <text:p text:style-name="Preformatted_20_Text"><text:span text:style-name="Source_20_Text">User profile</text:span></text:p>
      <text:p text:style-name="P1"><text:span text:style-name="Source_20_Text">Admin-only user listing</text:span></text:p>
      <text:h text:style-name="Heading_20_2" text:outline-level="2">tasks app</text:h>
      <text:p text:style-name="Text_20_body">This app will handle:</text:p>
      <text:p text:style-name="Preformatted_20_Text"><text:span text:style-name="Source_20_Text">Task creation</text:span></text:p>
      <text:p text:style-name="Preformatted_20_Text"><text:span text:style-name="Source_20_Text">Task assignment</text:span></text:p>
      <text:p text:style-name="Preformatted_20_Text"><text:span text:style-name="Source_20_Text">Task listing</text:span></text:p>
      <text:p text:style-name="Preformatted_20_Text"><text:span text:style-name="Source_20_Text">Task status updates</text:span></text:p>
      <text:p text:style-name="Preformatted_20_Text"><text:span text:style-name="Source_20_Text">Task filtering</text:span></text:p>
      <text:p text:style-name="P1"><text:span text:style-name="Source_20_Text">Task permissions</text:span></text:p>
      <text:h text:style-name="Heading_20_2" text:outline-level="2">dashboard app</text:h>
      <text:p text:style-name="Text_20_body">This app will handle:</text:p>
      <text:p text:style-name="Preformatted_20_Text"><text:span text:style-name="Source_20_Text">Admin dashboard statistics</text:span></text:p>
      <text:p text:style-name="Preformatted_20_Text"><text:span text:style-name="Source_20_Text">User dashboard statistics</text:span></text:p>
      <text:p text:style-name="Preformatted_20_Text"><text:span text:style-name="Source_20_Text">Task count summaries</text:span></text:p>
      <text:p text:style-name="P1"><text:span text:style-name="Source_20_Text">Status-wise task data</text:span></text:p>
      <text:p text:style-name="Horizontal_20_Line"/>
      <text:h text:style-name="Heading_20_1" text:outline-level="1">10. Django Server Tested</text:h>
      <text:p text:style-name="Text_20_body">We started the Django development server:</text:p>
      <text:p text:style-name="P1"><text:span text:style-name="Source_20_Text">python manage.py runserver</text:span></text:p>
      <text:p text:style-name="Text_20_body">The server ran successfully at:</text:p>
      <text:p text:style-name="P1"><text:span text:style-name="Source_20_Text">http://127.0.0.1:8000/</text:span></text:p>
      <text:h text:style-name="Heading_20_3" text:outline-level="3">Status</text:h>
      <text:p text:style-name="Text_20_body">Django backend is successfully initialized and running.</text:p>
      <text:p text:style-name="Horizontal_20_Line"/>
      <text:h text:style-name="Heading_20_1" text:outline-level="1"><text:soft-page-break/>Current Completion Status</text:h>
      <text:p text:style-name="Preformatted_20_Text"><text:span text:style-name="Source_20_Text">System tools installed <text:s text:c="7"/>: Completed</text:span></text:p>
      <text:p text:style-name="Preformatted_20_Text"><text:span text:style-name="Source_20_Text">Project folder created <text:s text:c="7"/>: Completed</text:span></text:p>
      <text:p text:style-name="Preformatted_20_Text"><text:span text:style-name="Source_20_Text">Backend virtual environment <text:s text:c="2"/>: Completed</text:span></text:p>
      <text:p text:style-name="Preformatted_20_Text"><text:span text:style-name="Source_20_Text">Backend packages installed <text:s text:c="3"/>: Completed</text:span></text:p>
      <text:p text:style-name="Preformatted_20_Text"><text:span text:style-name="Source_20_Text">requirements.txt generated <text:s text:c="3"/>: Completed</text:span></text:p>
      <text:p text:style-name="Preformatted_20_Text"><text:span text:style-name="Source_20_Text">Django project created <text:s text:c="7"/>: Completed</text:span></text:p>
      <text:p text:style-name="Preformatted_20_Text"><text:span text:style-name="Source_20_Text">Django apps created <text:s text:c="10"/>: Completed</text:span></text:p>
      <text:p text:style-name="P1"><text:span text:style-name="Source_20_Text">Initial server test <text:s text:c="10"/>: Completed</text:span></text:p>
      <text:p text:style-name="Horizontal_20_Line"/>
      <text:h text:style-name="Heading_20_1" text:outline-level="1">Current Project State</text:h>
      <text:p text:style-name="Preformatted_20_Text"><text:span text:style-name="Source_20_Text">We now have a clean Django backend foundation.</text:span></text:p>
      <text:p text:style-name="Preformatted_20_Text"><text:span text:style-name="Source_20_Text">No business logic has been added yet.</text:span></text:p>
      <text:p text:style-name="Preformatted_20_Text"><text:span text:style-name="Source_20_Text">No database models have been customized yet.</text:span></text:p>
      <text:p text:style-name="Preformatted_20_Text"><text:span text:style-name="Source_20_Text">No APIs have been created yet.</text:span></text:p>
      <text:p text:style-name="P1"><text:span text:style-name="Source_20_Text">No React frontend has been created yet.</text:span></text:p>
      <text:p text:style-name="Horizontal_20_Line"/>
      <text:h text:style-name="Heading_20_1" text:outline-level="1">Next Step</text:h>
      <text:p text:style-name="Text_20_body">Now we move to backend configuration:</text:p>
      <text:p text:style-name="Preformatted_20_Text"><text:span text:style-name="Source_20_Text">1. Configure settings.py</text:span></text:p>
      <text:p text:style-name="Preformatted_20_Text"><text:span text:style-name="Source_20_Text">2. Add installed apps</text:span></text:p>
      <text:p text:style-name="Preformatted_20_Text"><text:span text:style-name="Source_20_Text">3. Configure Django REST Framework</text:span></text:p>
      <text:p text:style-name="Preformatted_20_Text"><text:span text:style-name="Source_20_Text">4. Configure JWT authentication</text:span></text:p>
      <text:p text:style-name="Preformatted_20_Text"><text:span text:style-name="Source_20_Text">5. Configure CORS</text:span></text:p>
      <text:p text:style-name="Preformatted_20_Text"><text:span text:style-name="Source_20_Text">6. Configure PostgreSQL</text:span></text:p>
      <text:p text:style-name="Preformatted_20_Text"><text:span text:style-name="Source_20_Text">7. Create custom user model with Admin/User role</text:span></text:p>
      <text:p text:style-name="Preformatted_20_Text"><text:span text:style-name="Source_20_Text">8. Run migrations</text:span></text:p>
      <text:p text:style-name="P1"><text:span text:style-name="Source_20_Text">9. Create superuser</text:span></text:p>
      <text:p text:style-name="P2"><text:span text:style-name="Source_20_Text"/></text:p>
      <text:h text:style-name="Heading_20_2" text:outline-level="2"/>
      <text:p text:style-name="Text_20_body"/>
      <text:p text:style-name="Text_20_body"/>
      <text:p text:style-name="Text_20_body"/>
      <text:p text:style-name="Text_20_body"/>
      <text:p text:style-name="Text_20_body"/>
      <text:h text:style-name="Heading_20_2" text:outline-level="2"><text:soft-page-break/>Documentation — Backend Authentication Setup Completed</text:h>
      <text:h text:style-name="Heading_20_3" text:outline-level="3">Project Location</text:h>
      <text:p text:style-name="P1"><text:span text:style-name="Source_20_Text">~/Downloads/All_Gits/taskflow/backend</text:span></text:p>
      <text:p text:style-name="Horizontal_20_Line"/>
      <text:h text:style-name="Heading_20_1" text:outline-level="1">1. Django Settings Configured</text:h>
      <text:p text:style-name="Text_20_body">We updated the main Django settings file:</text:p>
      <text:p text:style-name="P1"><text:span text:style-name="Source_20_Text">taskflow_backend/settings.py</text:span></text:p>
      <text:h text:style-name="Heading_20_3" text:outline-level="3">Configurations Added</text:h>
      <text:p text:style-name="Preformatted_20_Text"><text:span text:style-name="Source_20_Text">Django REST Framework</text:span></text:p>
      <text:p text:style-name="Preformatted_20_Text"><text:span text:style-name="Source_20_Text">JWT authentication</text:span></text:p>
      <text:p text:style-name="Preformatted_20_Text"><text:span text:style-name="Source_20_Text">CORS support</text:span></text:p>
      <text:p text:style-name="Preformatted_20_Text"><text:span text:style-name="Source_20_Text">PostgreSQL database connection</text:span></text:p>
      <text:p text:style-name="Preformatted_20_Text"><text:span text:style-name="Source_20_Text">Custom user model</text:span></text:p>
      <text:p text:style-name="Preformatted_20_Text"><text:span text:style-name="Source_20_Text">Static files setup</text:span></text:p>
      <text:p text:style-name="P1"><text:span text:style-name="Source_20_Text">Asia/Kolkata timezone</text:span></text:p>
      <text:h text:style-name="Heading_20_3" text:outline-level="3">Important Setting</text:h>
      <text:p text:style-name="P1"><text:span text:style-name="Source_20_Text">AUTH_USER_MODEL = "accounts.User"</text:span></text:p>
      <text:p text:style-name="Text_20_body">This tells Django to use our custom user model instead of Django’s default user model.</text:p>
      <text:p text:style-name="Horizontal_20_Line"/>
      <text:h text:style-name="Heading_20_1" text:outline-level="1">2. Environment Variables Added</text:h>
      <text:p text:style-name="Text_20_body">We created a <text:span text:style-name="Source_20_Text">.env</text:span> file inside the backend folder.</text:p>
      <text:h text:style-name="Heading_20_3" text:outline-level="3">Purpose</text:h>
      <text:p text:style-name="Text_20_body">The <text:span text:style-name="Source_20_Text">.env</text:span> file stores sensitive and environment-specific values like:</text:p>
      <text:p text:style-name="Preformatted_20_Text"><text:span text:style-name="Source_20_Text">SECRET_KEY</text:span></text:p>
      <text:p text:style-name="Preformatted_20_Text"><text:span text:style-name="Source_20_Text">DEBUG</text:span></text:p>
      <text:p text:style-name="Preformatted_20_Text"><text:span text:style-name="Source_20_Text">Database name</text:span></text:p>
      <text:p text:style-name="Preformatted_20_Text"><text:span text:style-name="Source_20_Text">Database user</text:span></text:p>
      <text:p text:style-name="Preformatted_20_Text"><text:span text:style-name="Source_20_Text">Database password</text:span></text:p>
      <text:p text:style-name="Preformatted_20_Text"><text:span text:style-name="Source_20_Text">Database host</text:span></text:p>
      <text:p text:style-name="P1"><text:span text:style-name="Source_20_Text">Database port</text:span></text:p>
      <text:p text:style-name="Text_20_body">This keeps configuration clean and deployment-ready.</text:p>
      <text:p text:style-name="Horizontal_20_Line"/>
      <text:h text:style-name="Heading_20_1" text:outline-level="1"><text:soft-page-break/>3. PostgreSQL Database Created</text:h>
      <text:p text:style-name="Text_20_body">We created a PostgreSQL database for the project.</text:p>
      <text:h text:style-name="Heading_20_3" text:outline-level="3">Database Details</text:h>
      <text:p text:style-name="Preformatted_20_Text"><text:span text:style-name="Source_20_Text">Database name : taskflow_db</text:span></text:p>
      <text:p text:style-name="Preformatted_20_Text"><text:span text:style-name="Source_20_Text">Database user : taskflow_user</text:span></text:p>
      <text:p text:style-name="Preformatted_20_Text"><text:span text:style-name="Source_20_Text">Database host : localhost</text:span></text:p>
      <text:p text:style-name="P1"><text:span text:style-name="Source_20_Text">Database port : 5432</text:span></text:p>
      <text:h text:style-name="Heading_20_3" text:outline-level="3">Permissions Given</text:h>
      <text:p text:style-name="Text_20_body">The database user was given permission to access and manage the database schema.</text:p>
      <text:p text:style-name="Text_20_body">This confirmed that Django can connect to PostgreSQL successfully.</text:p>
      <text:p text:style-name="Horizontal_20_Line"/>
      <text:h text:style-name="Heading_20_1" text:outline-level="1">4. Custom User Model Created</text:h>
      <text:p text:style-name="Text_20_body">We created a custom user model inside:</text:p>
      <text:p text:style-name="P1"><text:span text:style-name="Source_20_Text">accounts/models.py</text:span></text:p>
      <text:h text:style-name="Heading_20_3" text:outline-level="3">Custom User Features</text:h>
      <text:p text:style-name="Text_20_body">The user model extends Django’s <text:span text:style-name="Source_20_Text">AbstractUser</text:span> and adds a role field.</text:p>
      <text:h text:style-name="Heading_20_3" text:outline-level="3">Roles Added</text:h>
      <text:p text:style-name="Preformatted_20_Text"><text:span text:style-name="Source_20_Text">ADMIN</text:span></text:p>
      <text:p text:style-name="P1"><text:span text:style-name="Source_20_Text">USER</text:span></text:p>
      <text:h text:style-name="Heading_20_3" text:outline-level="3">Final User Model Supports</text:h>
      <text:p text:style-name="Preformatted_20_Text"><text:span text:style-name="Source_20_Text">Username</text:span></text:p>
      <text:p text:style-name="Preformatted_20_Text"><text:span text:style-name="Source_20_Text">Email</text:span></text:p>
      <text:p text:style-name="Preformatted_20_Text"><text:span text:style-name="Source_20_Text">Password</text:span></text:p>
      <text:p text:style-name="Preformatted_20_Text"><text:span text:style-name="Source_20_Text">Role</text:span></text:p>
      <text:p text:style-name="Preformatted_20_Text"><text:span text:style-name="Source_20_Text">Active status</text:span></text:p>
      <text:p text:style-name="Preformatted_20_Text"><text:span text:style-name="Source_20_Text">Staff status</text:span></text:p>
      <text:p text:style-name="P1"><text:span text:style-name="Source_20_Text">Superuser status</text:span></text:p>
      <text:h text:style-name="Heading_20_3" text:outline-level="3">Indexing Added</text:h>
      <text:p text:style-name="Text_20_body">Indexes were added for:</text:p>
      <text:p text:style-name="Preformatted_20_Text"><text:span text:style-name="Source_20_Text">role</text:span></text:p>
      <text:p text:style-name="P1"><text:span text:style-name="Source_20_Text">email</text:span></text:p>
      <text:p text:style-name="Text_20_body">This improves query performance when filtering users by role or email.</text:p>
      <text:p text:style-name="Horizontal_20_Line"/>
      <text:h text:style-name="Heading_20_1" text:outline-level="1"><text:soft-page-break/>5. User Model Registered in Django Admin</text:h>
      <text:p text:style-name="Text_20_body">We updated:</text:p>
      <text:p text:style-name="P1"><text:span text:style-name="Source_20_Text">accounts/admin.py</text:span></text:p>
      <text:p text:style-name="Text_20_body">Now the Django admin panel can manage users.</text:p>
      <text:h text:style-name="Heading_20_3" text:outline-level="3">Admin Panel Supports</text:h>
      <text:p text:style-name="Preformatted_20_Text"><text:span text:style-name="Source_20_Text">View users</text:span></text:p>
      <text:p text:style-name="Preformatted_20_Text"><text:span text:style-name="Source_20_Text">Search by username/email</text:span></text:p>
      <text:p text:style-name="Preformatted_20_Text"><text:span text:style-name="Source_20_Text">Filter by role</text:span></text:p>
      <text:p text:style-name="Preformatted_20_Text"><text:span text:style-name="Source_20_Text">Filter by active status</text:span></text:p>
      <text:p text:style-name="Preformatted_20_Text"><text:span text:style-name="Source_20_Text">Edit user role</text:span></text:p>
      <text:p text:style-name="P1"><text:span text:style-name="Source_20_Text">Create users with role</text:span></text:p>
      <text:p text:style-name="Text_20_body">This is why we were able to change the superuser role to:</text:p>
      <text:p text:style-name="P1"><text:span text:style-name="Source_20_Text">ADMIN</text:span></text:p>
      <text:p text:style-name="Horizontal_20_Line"/>
      <text:h text:style-name="Heading_20_1" text:outline-level="1">6. Authentication Serializers Created</text:h>
      <text:p text:style-name="Text_20_body">We created:</text:p>
      <text:p text:style-name="P1"><text:span text:style-name="Source_20_Text">accounts/serializers.py</text:span></text:p>
      <text:h text:style-name="Heading_20_3" text:outline-level="3">Serializers Added</text:h>
      <text:p text:style-name="Preformatted_20_Text"><text:span text:style-name="Source_20_Text">UserSerializer</text:span></text:p>
      <text:p text:style-name="Preformatted_20_Text"><text:span text:style-name="Source_20_Text">RegisterSerializer</text:span></text:p>
      <text:p text:style-name="P1"><text:span text:style-name="Source_20_Text">LoginSerializer</text:span></text:p>
      <text:h text:style-name="Heading_20_3" text:outline-level="3">Purpose</text:h>
      <text:p text:style-name="Text_20_body"><text:span text:style-name="Source_20_Text">UserSerializer</text:span> returns safe user details.</text:p>
      <text:p text:style-name="Text_20_body"><text:span text:style-name="Source_20_Text">RegisterSerializer</text:span> handles user registration and password hashing.</text:p>
      <text:p text:style-name="Text_20_body"><text:span text:style-name="Source_20_Text">LoginSerializer</text:span> validates username and password.</text:p>
      <text:p text:style-name="Text_20_body">Important: passwords are saved securely using Django’s password hashing system, not as plain text.</text:p>
      <text:p text:style-name="Horizontal_20_Line"/>
      <text:p text:style-name="Text_20_body"/>
      <text:p text:style-name="Text_20_body"/>
      <text:p text:style-name="Text_20_body"/>
      <text:h text:style-name="Heading_20_1" text:outline-level="1"><text:soft-page-break/>7. Authentication Views Created</text:h>
      <text:p text:style-name="Text_20_body">We updated:</text:p>
      <text:p text:style-name="P1"><text:span text:style-name="Source_20_Text">accounts/views.py</text:span></text:p>
      <text:h text:style-name="Heading_20_3" text:outline-level="3">Views Added</text:h>
      <text:p text:style-name="Preformatted_20_Text"><text:span text:style-name="Source_20_Text">RegisterView</text:span></text:p>
      <text:p text:style-name="Preformatted_20_Text"><text:span text:style-name="Source_20_Text">LoginView</text:span></text:p>
      <text:p text:style-name="Preformatted_20_Text"><text:span text:style-name="Source_20_Text">ProfileView</text:span></text:p>
      <text:p text:style-name="Preformatted_20_Text"><text:span text:style-name="Source_20_Text">UserListView</text:span></text:p>
      <text:p text:style-name="P1"><text:span text:style-name="Source_20_Text">IsAdminRole permission class</text:span></text:p>
      <text:h text:style-name="Heading_20_3" text:outline-level="3">Purpose of Each View</text:h>
      <text:p text:style-name="Preformatted_20_Text"><text:span text:style-name="Source_20_Text">RegisterView <text:s/>: Allows user registration</text:span></text:p>
      <text:p text:style-name="Preformatted_20_Text"><text:span text:style-name="Source_20_Text">LoginView <text:s text:c="4"/>: Authenticates user and returns JWT tokens</text:span></text:p>
      <text:p text:style-name="Preformatted_20_Text"><text:span text:style-name="Source_20_Text">ProfileView <text:s text:c="2"/>: Returns logged-in user profile</text:span></text:p>
      <text:p text:style-name="P1"><text:span text:style-name="Source_20_Text">UserListView <text:s/>: Allows only ADMIN users to view all users</text:span></text:p>
      <text:p text:style-name="Horizontal_20_Line"/>
      <text:h text:style-name="Heading_20_1" text:outline-level="1">8. JWT Authentication Added</text:h>
      <text:p text:style-name="Text_20_body">We used:</text:p>
      <text:p text:style-name="P1"><text:span text:style-name="Source_20_Text">djangorestframework-simplejwt</text:span></text:p>
      <text:h text:style-name="Heading_20_3" text:outline-level="3">Login API Returns</text:h>
      <text:p text:style-name="Preformatted_20_Text"><text:span text:style-name="Source_20_Text">access token</text:span></text:p>
      <text:p text:style-name="Preformatted_20_Text"><text:span text:style-name="Source_20_Text">refresh token</text:span></text:p>
      <text:p text:style-name="P1"><text:span text:style-name="Source_20_Text">logged-in user details</text:span></text:p>
      <text:h text:style-name="Heading_20_3" text:outline-level="3">Access Token Usage</text:h>
      <text:p text:style-name="Text_20_body">Protected APIs require this format:</text:p>
      <text:p text:style-name="P1"><text:span text:style-name="Source_20_Text">Authorization: Bearer ACCESS_TOKEN</text:span></text:p>
      <text:p text:style-name="Text_20_body">This was tested successfully.</text:p>
      <text:p text:style-name="Horizontal_20_Line"/>
      <text:p text:style-name="Text_20_body"/>
      <text:p text:style-name="Text_20_body"/>
      <text:p text:style-name="Text_20_body"/>
      <text:p text:style-name="Text_20_body"/>
      <text:h text:style-name="Heading_20_1" text:outline-level="1"><text:soft-page-break/>9. URL Routing Configured</text:h>
      <text:p text:style-name="Text_20_body">We configured app-level URLs in:</text:p>
      <text:p text:style-name="P1"><text:span text:style-name="Source_20_Text">accounts/urls.py</text:span></text:p>
      <text:h text:style-name="Heading_20_3" text:outline-level="3">Auth API Routes</text:h>
      <text:p text:style-name="Preformatted_20_Text"><text:span text:style-name="Source_20_Text">POST /api/auth/register/</text:span></text:p>
      <text:p text:style-name="Preformatted_20_Text"><text:span text:style-name="Source_20_Text">POST /api/auth/login/</text:span></text:p>
      <text:p text:style-name="Preformatted_20_Text"><text:span text:style-name="Source_20_Text">POST /api/auth/token/refresh/</text:span></text:p>
      <text:p text:style-name="Preformatted_20_Text"><text:span text:style-name="Source_20_Text">GET <text:s/>/api/auth/profile/</text:span></text:p>
      <text:p text:style-name="P1"><text:span text:style-name="Source_20_Text">GET <text:s/>/api/auth/users/</text:span></text:p>
      <text:p text:style-name="Text_20_body">We also connected these routes in:</text:p>
      <text:p text:style-name="P1"><text:span text:style-name="Source_20_Text">taskflow_backend/urls.py</text:span></text:p>
      <text:p text:style-name="Text_20_body">Using:</text:p>
      <text:p text:style-name="P1"><text:span text:style-name="Source_20_Text">path("api/auth/", include("accounts.urls"))</text:span></text:p>
      <text:p text:style-name="Horizontal_20_Line"/>
      <text:h text:style-name="Heading_20_1" text:outline-level="1">10. Database Migrations Completed</text:h>
      <text:p text:style-name="Text_20_body">You successfully ran:</text:p>
      <text:p text:style-name="Preformatted_20_Text"><text:span text:style-name="Source_20_Text">python manage.py makemigrations accounts</text:span></text:p>
      <text:p text:style-name="P1"><text:span text:style-name="Source_20_Text">python manage.py migrate</text:span></text:p>
      <text:h text:style-name="Heading_20_3" text:outline-level="3">Migration Output Confirmed</text:h>
      <text:p text:style-name="Text_20_body">The following migrations were applied successfully:</text:p>
      <text:p text:style-name="Preformatted_20_Text"><text:span text:style-name="Source_20_Text">accounts</text:span></text:p>
      <text:p text:style-name="Preformatted_20_Text"><text:span text:style-name="Source_20_Text">admin</text:span></text:p>
      <text:p text:style-name="Preformatted_20_Text"><text:span text:style-name="Source_20_Text">auth</text:span></text:p>
      <text:p text:style-name="Preformatted_20_Text"><text:span text:style-name="Source_20_Text">contenttypes</text:span></text:p>
      <text:p text:style-name="P1"><text:span text:style-name="Source_20_Text">sessions</text:span></text:p>
      <text:p text:style-name="Text_20_body">Most important line:</text:p>
      <text:p text:style-name="P1"><text:span text:style-name="Source_20_Text">Applying accounts.0001_initial... OK</text:span></text:p>
      <text:p text:style-name="Text_20_body">This confirms that our custom user model was created successfully in PostgreSQL.</text:p>
      <text:p text:style-name="Horizontal_20_Line"/>
      <text:p text:style-name="Text_20_body"/>
      <text:p text:style-name="Text_20_body"/>
      <text:p text:style-name="Text_20_body"/>
      <text:h text:style-name="Heading_20_1" text:outline-level="1"><text:soft-page-break/>11. Django Admin Login Tested</text:h>
      <text:p text:style-name="Text_20_body">Django admin was tested at:</text:p>
      <text:p text:style-name="P1"><text:span text:style-name="Source_20_Text">http://127.0.0.1:8000/admin/</text:span></text:p>
      <text:h text:style-name="Heading_20_3" text:outline-level="3">Status</text:h>
      <text:p text:style-name="P1"><text:span text:style-name="Source_20_Text">Django admin login worked successfully.</text:span></text:p>
      <text:p text:style-name="Text_20_body">The admin user role was updated to:</text:p>
      <text:p text:style-name="P1"><text:span text:style-name="Source_20_Text">ADMIN</text:span></text:p>
      <text:p text:style-name="Horizontal_20_Line"/>
      <text:h text:style-name="Heading_20_1" text:outline-level="1">12. Profile API Tested Successfully</text:h>
      <text:p text:style-name="Text_20_body">API tested:</text:p>
      <text:p text:style-name="P1"><text:span text:style-name="Source_20_Text">GET /api/auth/profile/</text:span></text:p>
      <text:p text:style-name="Text_20_body">With:</text:p>
      <text:p text:style-name="P1"><text:span text:style-name="Source_20_Text">Authorization: Bearer ACCESS_TOKEN</text:span></text:p>
      <text:h text:style-name="Heading_20_3" text:outline-level="3">Successful Response</text:h>
      <text:p text:style-name="Preformatted_20_Text"><text:span text:style-name="Source_20_Text">{</text:span></text:p>
      <text:p text:style-name="Preformatted_20_Text"><text:span text:style-name="Source_20_Text"><text:s text:c="2"/>"id": 1,</text:span></text:p>
      <text:p text:style-name="Preformatted_20_Text"><text:span text:style-name="Source_20_Text"><text:s text:c="2"/>"username": "admin",</text:span></text:p>
      <text:p text:style-name="Preformatted_20_Text"><text:span text:style-name="Source_20_Text"><text:s text:c="2"/>"email": "abdulch530@gmail.com",</text:span></text:p>
      <text:p text:style-name="Preformatted_20_Text"><text:span text:style-name="Source_20_Text"><text:s text:c="2"/>"role": "ADMIN",</text:span></text:p>
      <text:p text:style-name="Preformatted_20_Text"><text:span text:style-name="Source_20_Text"><text:s text:c="2"/>"is_active": true</text:span></text:p>
      <text:p text:style-name="P1"><text:span text:style-name="Source_20_Text">}</text:span></text:p>
      <text:p text:style-name="Text_20_body">This confirms:</text:p>
      <text:p text:style-name="Preformatted_20_Text"><text:span text:style-name="Source_20_Text">JWT authentication is working.</text:span></text:p>
      <text:p text:style-name="Preformatted_20_Text"><text:span text:style-name="Source_20_Text">The backend identifies the logged-in user correctly.</text:span></text:p>
      <text:p text:style-name="P1"><text:span text:style-name="Source_20_Text">The admin role is correctly assigned.</text:span></text:p>
      <text:p text:style-name="Horizontal_20_Line"/>
      <text:p text:style-name="Text_20_body"/>
      <text:p text:style-name="Text_20_body"/>
      <text:p text:style-name="Text_20_body"/>
      <text:p text:style-name="Text_20_body"/>
      <text:h text:style-name="Heading_20_1" text:outline-level="1"><text:soft-page-break/>13. Admin-Only User List API Tested Successfully</text:h>
      <text:p text:style-name="Text_20_body">API tested:</text:p>
      <text:p text:style-name="P1"><text:span text:style-name="Source_20_Text">GET /api/auth/users/</text:span></text:p>
      <text:h text:style-name="Heading_20_3" text:outline-level="3">Successful Response</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id": 1,</text:span></text:p>
      <text:p text:style-name="Preformatted_20_Text"><text:span text:style-name="Source_20_Text"><text:s text:c="4"/>"username": "admin",</text:span></text:p>
      <text:p text:style-name="Preformatted_20_Text"><text:span text:style-name="Source_20_Text"><text:s text:c="4"/>"email": "abdulch530@gmail.com",</text:span></text:p>
      <text:p text:style-name="Preformatted_20_Text"><text:span text:style-name="Source_20_Text"><text:s text:c="4"/>"role": "ADMIN",</text:span></text:p>
      <text:p text:style-name="Preformatted_20_Text"><text:span text:style-name="Source_20_Text"><text:s text:c="4"/>"is_active": tru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id": 2,</text:span></text:p>
      <text:p text:style-name="Preformatted_20_Text"><text:span text:style-name="Source_20_Text"><text:s text:c="4"/>"username": "user1",</text:span></text:p>
      <text:p text:style-name="Preformatted_20_Text"><text:span text:style-name="Source_20_Text"><text:s text:c="4"/>"email": "user1@example.com",</text:span></text:p>
      <text:p text:style-name="Preformatted_20_Text"><text:span text:style-name="Source_20_Text"><text:s text:c="4"/>"role": "USER",</text:span></text:p>
      <text:p text:style-name="Preformatted_20_Text"><text:span text:style-name="Source_20_Text"><text:s text:c="4"/>"is_active": true</text:span></text:p>
      <text:p text:style-name="Preformatted_20_Text"><text:span text:style-name="Source_20_Text"><text:s text:c="2"/>}</text:span></text:p>
      <text:p text:style-name="P1"><text:span text:style-name="Source_20_Text">]</text:span></text:p>
      <text:p text:style-name="Text_20_body">This confirms:</text:p>
      <text:p text:style-name="Preformatted_20_Text"><text:span text:style-name="Source_20_Text">Admin-only permission is working.</text:span></text:p>
      <text:p text:style-name="Preformatted_20_Text"><text:span text:style-name="Source_20_Text">ADMIN user can view all users.</text:span></text:p>
      <text:p text:style-name="P1"><text:span text:style-name="Source_20_Text">Registered USER account exists.</text:span></text:p>
      <text:p text:style-name="Horizontal_20_Line"/>
      <text:h text:style-name="Heading_20_1" text:outline-level="1">Current Backend Completion Status</text:h>
      <text:p text:style-name="Preformatted_20_Text"><text:span text:style-name="Source_20_Text">Backend project setup <text:s text:c="12"/>: Completed</text:span></text:p>
      <text:p text:style-name="Preformatted_20_Text"><text:span text:style-name="Source_20_Text">PostgreSQL connection <text:s text:c="12"/>: Completed</text:span></text:p>
      <text:p text:style-name="Preformatted_20_Text"><text:span text:style-name="Source_20_Text">Environment variable setup <text:s text:c="7"/>: Completed</text:span></text:p>
      <text:p text:style-name="Preformatted_20_Text"><text:span text:style-name="Source_20_Text">Custom user model <text:s text:c="16"/>: Completed</text:span></text:p>
      <text:p text:style-name="Preformatted_20_Text"><text:span text:style-name="Source_20_Text">JWT login <text:s text:c="24"/>: Completed</text:span></text:p>
      <text:p text:style-name="Preformatted_20_Text"><text:span text:style-name="Source_20_Text">User registration <text:s text:c="16"/>: Completed</text:span></text:p>
      <text:p text:style-name="Preformatted_20_Text"><text:span text:style-name="Source_20_Text">Profile API <text:s text:c="22"/>: Completed</text:span></text:p>
      <text:p text:style-name="Preformatted_20_Text"><text:span text:style-name="Source_20_Text">Admin-only user listing <text:s text:c="10"/>: Completed</text:span></text:p>
      <text:p text:style-name="Preformatted_20_Text"><text:span text:style-name="Source_20_Text">Django admin setup <text:s text:c="15"/>: Completed</text:span></text:p>
      <text:p text:style-name="P1"><text:span text:style-name="Source_20_Text">Initial database migration <text:s text:c="7"/>: Completed</text:span></text:p>
      <text:p text:style-name="Horizontal_20_Line"/>
      <text:p text:style-name="Text_20_body"/>
      <text:p text:style-name="Text_20_body"/>
      <text:p text:style-name="Text_20_body"/>
      <text:h text:style-name="Heading_20_1" text:outline-level="1"><text:soft-page-break/>APIs Completed So Far</text:h>
      <text:p text:style-name="Preformatted_20_Text"><text:span text:style-name="Source_20_Text">POST /api/auth/register/</text:span></text:p>
      <text:p text:style-name="Preformatted_20_Text"><text:span text:style-name="Source_20_Text">POST /api/auth/login/</text:span></text:p>
      <text:p text:style-name="Preformatted_20_Text"><text:span text:style-name="Source_20_Text">POST /api/auth/token/refresh/</text:span></text:p>
      <text:p text:style-name="Preformatted_20_Text"><text:span text:style-name="Source_20_Text">GET <text:s/>/api/auth/profile/</text:span></text:p>
      <text:p text:style-name="P1"><text:span text:style-name="Source_20_Text">GET <text:s/>/api/auth/users/</text:span></text:p>
      <text:p text:style-name="Horizontal_20_Line"/>
      <text:h text:style-name="Heading_20_1" text:outline-level="1">Building Next</text:h>
      <text:p text:style-name="Text_20_body">Now we move to the main business feature:</text:p>
      <text:p text:style-name="P1"><text:span text:style-name="Source_20_Text">Task Model + Task CRUD APIs + Role-Based Permissions</text:span></text:p>
      <text:p text:style-name="Text_20_body">Next section will include:</text:p>
      <text:p text:style-name="Preformatted_20_Text"><text:span text:style-name="Source_20_Text">Task model</text:span></text:p>
      <text:p text:style-name="Preformatted_20_Text"><text:span text:style-name="Source_20_Text">Task serializer</text:span></text:p>
      <text:p text:style-name="Preformatted_20_Text"><text:span text:style-name="Source_20_Text">Task permissions</text:span></text:p>
      <text:p text:style-name="Preformatted_20_Text"><text:span text:style-name="Source_20_Text">Task list API</text:span></text:p>
      <text:p text:style-name="Preformatted_20_Text"><text:span text:style-name="Source_20_Text">Task create API</text:span></text:p>
      <text:p text:style-name="Preformatted_20_Text"><text:span text:style-name="Source_20_Text">Task detail API</text:span></text:p>
      <text:p text:style-name="Preformatted_20_Text"><text:span text:style-name="Source_20_Text">Task update API</text:span></text:p>
      <text:p text:style-name="Preformatted_20_Text"><text:span text:style-name="Source_20_Text">Task delete API</text:span></text:p>
      <text:p text:style-name="Preformatted_20_Text"><text:span text:style-name="Source_20_Text">Task status update API</text:span></text:p>
      <text:p text:style-name="Preformatted_20_Text"><text:span text:style-name="Source_20_Text">Admin can assign tasks</text:span></text:p>
      <text:p text:style-name="Preformatted_20_Text"><text:span text:style-name="Source_20_Text">User can view assigned tasks</text:span></text:p>
      <text:p text:style-name="P1"><text:span text:style-name="Source_20_Text">User can update only status of assigned tasks</text:span></text:p>
      <text:p text:style-name="Text_20_body"><text:span text:style-name="Source_20_Text"/></text:p>
      <text:p text:style-name="P1"><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ocumentation — Task Module Completed</text:h>
      <text:h text:style-name="Heading_20_3" text:outline-level="3">Current Project Location</text:h>
      <text:p text:style-name="P1"><text:span text:style-name="Source_20_Text">~/Downloads/All_Gits/taskflow/backend</text:span></text:p>
      <text:p text:style-name="Horizontal_20_Line"/>
      <text:h text:style-name="Heading_20_1" text:outline-level="1">1. Task App Configured</text:h>
      <text:p text:style-name="Text_20_body">We worked inside the existing Django app:</text:p>
      <text:p text:style-name="P1"><text:span text:style-name="Source_20_Text">tasks/</text:span></text:p>
      <text:p text:style-name="Text_20_body">This app is responsible for the main task management functionality of the project.</text:p>
      <text:p text:style-name="Horizontal_20_Line"/>
      <text:h text:style-name="Heading_20_1" text:outline-level="1">2. Task Model Created</text:h>
      <text:p text:style-name="Text_20_body">We updated:</text:p>
      <text:p text:style-name="P1"><text:span text:style-name="Source_20_Text">tasks/models.py</text:span></text:p>
      <text:h text:style-name="Heading_20_3" text:outline-level="3">Model Name</text:h>
      <text:p text:style-name="P1"><text:span text:style-name="Source_20_Text">Task</text:span></text:p>
      <text:h text:style-name="Heading_20_3" text:outline-level="3">Task Fields Added</text:h>
      <text:p text:style-name="Preformatted_20_Text"><text:span text:style-name="Source_20_Text">title</text:span></text:p>
      <text:p text:style-name="Preformatted_20_Text"><text:span text:style-name="Source_20_Text">description</text:span></text:p>
      <text:p text:style-name="Preformatted_20_Text"><text:span text:style-name="Source_20_Text">assigned_to</text:span></text:p>
      <text:p text:style-name="Preformatted_20_Text"><text:span text:style-name="Source_20_Text">created_by</text:span></text:p>
      <text:p text:style-name="Preformatted_20_Text"><text:span text:style-name="Source_20_Text">status</text:span></text:p>
      <text:p text:style-name="Preformatted_20_Text"><text:span text:style-name="Source_20_Text">priority</text:span></text:p>
      <text:p text:style-name="Preformatted_20_Text"><text:span text:style-name="Source_20_Text">due_date</text:span></text:p>
      <text:p text:style-name="Preformatted_20_Text"><text:span text:style-name="Source_20_Text">created_at</text:span></text:p>
      <text:p text:style-name="P1"><text:span text:style-name="Source_20_Text">updated_at</text:span></text:p>
      <text:h text:style-name="Heading_20_3" text:outline-level="3">Status Choices</text:h>
      <text:p text:style-name="Preformatted_20_Text"><text:span text:style-name="Source_20_Text">PENDING</text:span></text:p>
      <text:p text:style-name="Preformatted_20_Text"><text:span text:style-name="Source_20_Text">IN_PROGRESS</text:span></text:p>
      <text:p text:style-name="P1"><text:span text:style-name="Source_20_Text">COMPLETED</text:span></text:p>
      <text:h text:style-name="Heading_20_3" text:outline-level="3">Priority Choices</text:h>
      <text:p text:style-name="Preformatted_20_Text"><text:span text:style-name="Source_20_Text">LOW</text:span></text:p>
      <text:p text:style-name="Preformatted_20_Text"><text:span text:style-name="Source_20_Text">MEDIUM</text:span></text:p>
      <text:p text:style-name="P1"><text:span text:style-name="Source_20_Text">HIGH</text:span></text:p>
      <text:h text:style-name="Heading_20_3" text:outline-level="3"><text:soft-page-break/>User Relationships</text:h>
      <text:p text:style-name="Preformatted_20_Text"><text:span text:style-name="Source_20_Text">assigned_to : The user responsible for completing the task</text:span></text:p>
      <text:p text:style-name="P1"><text:span text:style-name="Source_20_Text">created_by <text:s/>: The admin who created the task</text:span></text:p>
      <text:p text:style-name="Text_20_body">Both fields are connected to our custom user model.</text:p>
      <text:p text:style-name="Horizontal_20_Line"/>
      <text:h text:style-name="Heading_20_1" text:outline-level="1">3. Database Optimization Added</text:h>
      <text:p text:style-name="Text_20_body">We added indexes for commonly queried fields:</text:p>
      <text:p text:style-name="Preformatted_20_Text"><text:span text:style-name="Source_20_Text">title</text:span></text:p>
      <text:p text:style-name="Preformatted_20_Text"><text:span text:style-name="Source_20_Text">status</text:span></text:p>
      <text:p text:style-name="Preformatted_20_Text"><text:span text:style-name="Source_20_Text">priority</text:span></text:p>
      <text:p text:style-name="Preformatted_20_Text"><text:span text:style-name="Source_20_Text">due_date</text:span></text:p>
      <text:p text:style-name="Preformatted_20_Text"><text:span text:style-name="Source_20_Text">created_at</text:span></text:p>
      <text:p text:style-name="Preformatted_20_Text"><text:span text:style-name="Source_20_Text">assigned_to + status</text:span></text:p>
      <text:p text:style-name="P1"><text:span text:style-name="Source_20_Text">created_by + status</text:span></text:p>
      <text:p text:style-name="Text_20_body">The task module now has proper relational modeling and query optimization.</text:p>
      <text:p text:style-name="Horizontal_20_Line"/>
      <text:h text:style-name="Heading_20_1" text:outline-level="1">4. Task Model Registered in Django Admin</text:h>
      <text:p text:style-name="Text_20_body">We updated:</text:p>
      <text:p text:style-name="P1"><text:span text:style-name="Source_20_Text">tasks/admin.py</text:span></text:p>
      <text:p text:style-name="Text_20_body">Now tasks can be managed from the Django admin panel.</text:p>
      <text:h text:style-name="Heading_20_3" text:outline-level="3">Admin Panel Supports</text:h>
      <text:p text:style-name="Preformatted_20_Text"><text:span text:style-name="Source_20_Text">View tasks</text:span></text:p>
      <text:p text:style-name="Preformatted_20_Text"><text:span text:style-name="Source_20_Text">Search tasks by title/description/user</text:span></text:p>
      <text:p text:style-name="Preformatted_20_Text"><text:span text:style-name="Source_20_Text">Filter tasks by status</text:span></text:p>
      <text:p text:style-name="Preformatted_20_Text"><text:span text:style-name="Source_20_Text">Filter tasks by priority</text:span></text:p>
      <text:p text:style-name="Preformatted_20_Text"><text:span text:style-name="Source_20_Text">Filter tasks by due date</text:span></text:p>
      <text:p text:style-name="P1"><text:span text:style-name="Source_20_Text">Sort by created date</text:span></text:p>
      <text:p text:style-name="Text_20_body">This is useful for demo and debugging.</text:p>
      <text:p text:style-name="Horizontal_20_Line"/>
      <text:p text:style-name="Text_20_body"/>
      <text:p text:style-name="Text_20_body"/>
      <text:p text:style-name="Text_20_body"/>
      <text:p text:style-name="Text_20_body"/>
      <text:h text:style-name="Heading_20_1" text:outline-level="1"><text:soft-page-break/>5. Task Serializer Created</text:h>
      <text:p text:style-name="Text_20_body"><text:span text:style-name="T1">C</text:span>reated:</text:p>
      <text:p text:style-name="P1"><text:span text:style-name="Source_20_Text">tasks/serializers.py</text:span></text:p>
      <text:h text:style-name="Heading_20_3" text:outline-level="3">Serializers Added</text:h>
      <text:p text:style-name="Preformatted_20_Text"><text:span text:style-name="Source_20_Text">TaskSerializer</text:span></text:p>
      <text:p text:style-name="P1"><text:span text:style-name="Source_20_Text">TaskStatusUpdateSerializer</text:span></text:p>
      <text:h text:style-name="Heading_20_3" text:outline-level="3">TaskSerializer Handles</text:h>
      <text:p text:style-name="Preformatted_20_Text"><text:span text:style-name="Source_20_Text">Create task</text:span></text:p>
      <text:p text:style-name="Preformatted_20_Text"><text:span text:style-name="Source_20_Text">List task</text:span></text:p>
      <text:p text:style-name="Preformatted_20_Text"><text:span text:style-name="Source_20_Text">Retrieve task</text:span></text:p>
      <text:p text:style-name="Preformatted_20_Text"><text:span text:style-name="Source_20_Text">Update task</text:span></text:p>
      <text:p text:style-name="Preformatted_20_Text"><text:span text:style-name="Source_20_Text">Show assigned user details</text:span></text:p>
      <text:p text:style-name="Preformatted_20_Text"><text:span text:style-name="Source_20_Text">Show created by details</text:span></text:p>
      <text:p text:style-name="P1"><text:span text:style-name="Source_20_Text">Validate assigned user role</text:span></text:p>
      <text:h text:style-name="Heading_20_3" text:outline-level="3">Important Validation Added</text:h>
      <text:p text:style-name="Text_20_body">Tasks can only be assigned to users with:</text:p>
      <text:p text:style-name="P1"><text:span text:style-name="Source_20_Text">USER</text:span></text:p>
      <text:p text:style-name="Text_20_body">This prevents assigning tasks to an admin account.</text:p>
      <text:p text:style-name="Horizontal_20_Line"/>
      <text:h text:style-name="Heading_20_1" text:outline-level="1">6. Task Status Serializer Created</text:h>
      <text:p text:style-name="Text_20_body"><text:span text:style-name="Source_20_Text">TaskStatusUpdateSerializer</text:span> was added for status-only updates.</text:p>
      <text:p text:style-name="Text_20_body">It allows users to update only:</text:p>
      <text:p text:style-name="P1"><text:span text:style-name="Source_20_Text">status</text:span></text:p>
      <text:p text:style-name="Text_20_body">Allowed status values:</text:p>
      <text:p text:style-name="Preformatted_20_Text"><text:span text:style-name="Source_20_Text">PENDING</text:span></text:p>
      <text:p text:style-name="Preformatted_20_Text"><text:span text:style-name="Source_20_Text">IN_PROGRESS</text:span></text:p>
      <text:p text:style-name="P1"><text:span text:style-name="Source_20_Text">COMPLETED</text:span></text:p>
      <text:p text:style-name="Text_20_body">This supports the requirement:</text:p>
      <text:p text:style-name="P1"><text:span text:style-name="Source_20_Text">User can update assigned task status.</text:span></text:p>
      <text:p text:style-name="Horizontal_20_Line"/>
      <text:p text:style-name="Text_20_body"/>
      <text:h text:style-name="Heading_20_1" text:outline-level="1"><text:soft-page-break/>7. Task Permissions Created</text:h>
      <text:p text:style-name="Text_20_body"><text:span text:style-name="T1">C</text:span>reated:</text:p>
      <text:p text:style-name="P1"><text:span text:style-name="Source_20_Text">tasks/permissions.py</text:span></text:p>
      <text:h text:style-name="Heading_20_3" text:outline-level="3">Permission Classes Added</text:h>
      <text:p text:style-name="Preformatted_20_Text"><text:span text:style-name="Source_20_Text">IsAdminRole</text:span></text:p>
      <text:p text:style-name="P1"><text:span text:style-name="Source_20_Text">IsAdminOrAssignedUser</text:span></text:p>
      <text:h text:style-name="Heading_20_3" text:outline-level="3">Permission Logic</text:h>
      <text:p text:style-name="Preformatted_20_Text"><text:span text:style-name="Source_20_Text">ADMIN:</text:span></text:p>
      <text:p text:style-name="Preformatted_20_Text"><text:span text:style-name="Source_20_Text">- Can view all tasks</text:span></text:p>
      <text:p text:style-name="Preformatted_20_Text"><text:span text:style-name="Source_20_Text">- Can create tasks</text:span></text:p>
      <text:p text:style-name="Preformatted_20_Text"><text:span text:style-name="Source_20_Text">- Can update full task details</text:span></text:p>
      <text:p text:style-name="Preformatted_20_Text"><text:span text:style-name="Source_20_Text">- Can delete tasks</text:span></text:p>
      <text:p text:style-name="Preformatted_20_Text"><text:span text:style-name="Source_20_Text">- Can update task status</text:span></text:p>
      <text:p text:style-name="Preformatted_20_Text"/>
      <text:p text:style-name="Preformatted_20_Text"><text:span text:style-name="Source_20_Text">USER:</text:span></text:p>
      <text:p text:style-name="Preformatted_20_Text"><text:span text:style-name="Source_20_Text">- Can view only assigned tasks</text:span></text:p>
      <text:p text:style-name="Preformatted_20_Text"><text:span text:style-name="Source_20_Text">- Can update only assigned task status</text:span></text:p>
      <text:p text:style-name="Preformatted_20_Text"><text:span text:style-name="Source_20_Text">- Cannot create tasks</text:span></text:p>
      <text:p text:style-name="Preformatted_20_Text"><text:span text:style-name="Source_20_Text">- Cannot update full task details</text:span></text:p>
      <text:p text:style-name="P1"><text:span text:style-name="Source_20_Text">- Cannot delete tasks</text:span></text:p>
      <text:p text:style-name="Horizontal_20_Line"/>
      <text:h text:style-name="Heading_20_1" text:outline-level="1">8. Task Views Created</text:h>
      <text:p text:style-name="Text_20_body">We updated:</text:p>
      <text:p text:style-name="P1"><text:span text:style-name="Source_20_Text">tasks/views.py</text:span></text:p>
      <text:h text:style-name="Heading_20_3" text:outline-level="3">Views Added</text:h>
      <text:p text:style-name="Preformatted_20_Text"><text:span text:style-name="Source_20_Text">TaskListCreateView</text:span></text:p>
      <text:p text:style-name="Preformatted_20_Text"><text:span text:style-name="Source_20_Text">TaskDetailView</text:span></text:p>
      <text:p text:style-name="P1"><text:span text:style-name="Source_20_Text">TaskStatusUpdateView</text:span></text:p>
      <text:p text:style-name="Horizontal_20_Line"/>
      <text:h text:style-name="Heading_20_2" text:outline-level="2">TaskListCreateView</text:h>
      <text:p text:style-name="Text_20_body">Handles:</text:p>
      <text:p text:style-name="Preformatted_20_Text"><text:span text:style-name="Source_20_Text">GET <text:s/>/api/tasks/</text:span></text:p>
      <text:p text:style-name="P1"><text:span text:style-name="Source_20_Text">POST /api/tasks/</text:span></text:p>
      <text:h text:style-name="Heading_20_3" text:outline-level="3">Logic</text:h>
      <text:p text:style-name="Preformatted_20_Text"><text:span text:style-name="Source_20_Text">ADMIN:</text:span></text:p>
      <text:p text:style-name="Preformatted_20_Text"><text:span text:style-name="Source_20_Text">- GET all tasks</text:span></text:p>
      <text:p text:style-name="Preformatted_20_Text"><text:span text:style-name="Source_20_Text">- POST create task</text:span></text:p>
      <text:p text:style-name="Preformatted_20_Text"/>
      <text:p text:style-name="Preformatted_20_Text"><text:soft-page-break/><text:span text:style-name="Source_20_Text">USER:</text:span></text:p>
      <text:p text:style-name="Preformatted_20_Text"><text:span text:style-name="Source_20_Text">- GET only assigned tasks</text:span></text:p>
      <text:p text:style-name="P1"><text:span text:style-name="Source_20_Text">- POST blocked</text:span></text:p>
      <text:p text:style-name="Horizontal_20_Line"/>
      <text:h text:style-name="Heading_20_2" text:outline-level="2">TaskDetailView</text:h>
      <text:p text:style-name="Text_20_body">Handles:</text:p>
      <text:p text:style-name="Preformatted_20_Text"><text:span text:style-name="Source_20_Text">GET <text:s text:c="3"/>/api/tasks/&lt;id&gt;/</text:span></text:p>
      <text:p text:style-name="Preformatted_20_Text"><text:span text:style-name="Source_20_Text">PUT <text:s text:c="3"/>/api/tasks/&lt;id&gt;/</text:span></text:p>
      <text:p text:style-name="Preformatted_20_Text"><text:span text:style-name="Source_20_Text">PATCH <text:s/>/api/tasks/&lt;id&gt;/</text:span></text:p>
      <text:p text:style-name="P1"><text:span text:style-name="Source_20_Text">DELETE /api/tasks/&lt;id&gt;/</text:span></text:p>
      <text:h text:style-name="Heading_20_3" text:outline-level="3">Logic</text:h>
      <text:p text:style-name="Preformatted_20_Text"><text:span text:style-name="Source_20_Text">ADMIN:</text:span></text:p>
      <text:p text:style-name="Preformatted_20_Text"><text:span text:style-name="Source_20_Text">- Can retrieve task</text:span></text:p>
      <text:p text:style-name="Preformatted_20_Text"><text:span text:style-name="Source_20_Text">- Can update full task</text:span></text:p>
      <text:p text:style-name="Preformatted_20_Text"><text:span text:style-name="Source_20_Text">- Can delete task</text:span></text:p>
      <text:p text:style-name="Preformatted_20_Text"/>
      <text:p text:style-name="Preformatted_20_Text"><text:span text:style-name="Source_20_Text">USER:</text:span></text:p>
      <text:p text:style-name="Preformatted_20_Text"><text:span text:style-name="Source_20_Text">- Can retrieve assigned task</text:span></text:p>
      <text:p text:style-name="Preformatted_20_Text"><text:span text:style-name="Source_20_Text">- Cannot update full task</text:span></text:p>
      <text:p text:style-name="P1"><text:span text:style-name="Source_20_Text">- Cannot delete task</text:span></text:p>
      <text:p text:style-name="Horizontal_20_Line"/>
      <text:h text:style-name="Heading_20_2" text:outline-level="2">TaskStatusUpdateView</text:h>
      <text:p text:style-name="Text_20_body">Handles:</text:p>
      <text:p text:style-name="P1"><text:span text:style-name="Source_20_Text">PATCH /api/tasks/&lt;id&gt;/status/</text:span></text:p>
      <text:h text:style-name="Heading_20_3" text:outline-level="3">Logic</text:h>
      <text:p text:style-name="Preformatted_20_Text"><text:span text:style-name="Source_20_Text">ADMIN:</text:span></text:p>
      <text:p text:style-name="Preformatted_20_Text"><text:span text:style-name="Source_20_Text">- Can update status of any task</text:span></text:p>
      <text:p text:style-name="Preformatted_20_Text"/>
      <text:p text:style-name="Preformatted_20_Text"><text:span text:style-name="Source_20_Text">USER:</text:span></text:p>
      <text:p text:style-name="P1"><text:span text:style-name="Source_20_Text">- Can update status only for assigned task</text:span></text:p>
      <text:p text:style-name="Horizontal_20_Line"/>
      <text:h text:style-name="Heading_20_1" text:outline-level="1">9. Task API URLs Created</text:h>
      <text:p text:style-name="Text_20_body">We created:</text:p>
      <text:p text:style-name="P1"><text:span text:style-name="Source_20_Text">tasks/urls.py</text:span></text:p>
      <text:h text:style-name="Heading_20_3" text:outline-level="3">Task API Routes</text:h>
      <text:p text:style-name="Preformatted_20_Text"><text:span text:style-name="Source_20_Text">GET <text:s text:c="3"/>/api/tasks/</text:span></text:p>
      <text:p text:style-name="Preformatted_20_Text"><text:span text:style-name="Source_20_Text">POST <text:s text:c="2"/>/api/tasks/</text:span></text:p>
      <text:p text:style-name="Preformatted_20_Text"><text:span text:style-name="Source_20_Text">GET <text:s text:c="3"/>/api/tasks/&lt;id&gt;/</text:span></text:p>
      <text:p text:style-name="Preformatted_20_Text"><text:soft-page-break/><text:span text:style-name="Source_20_Text">PUT <text:s text:c="3"/>/api/tasks/&lt;id&gt;/</text:span></text:p>
      <text:p text:style-name="Preformatted_20_Text"><text:span text:style-name="Source_20_Text">PATCH <text:s/>/api/tasks/&lt;id&gt;/</text:span></text:p>
      <text:p text:style-name="Preformatted_20_Text"><text:span text:style-name="Source_20_Text">DELETE /api/tasks/&lt;id&gt;/</text:span></text:p>
      <text:p text:style-name="P1"><text:span text:style-name="Source_20_Text">PATCH <text:s/>/api/tasks/&lt;id&gt;/status/</text:span></text:p>
      <text:p text:style-name="Horizontal_20_Line"/>
      <text:h text:style-name="Heading_20_1" text:outline-level="1">10. Main URL Routing Updated</text:h>
      <text:p text:style-name="Text_20_body"><text:span text:style-name="T1">U</text:span>pdated:</text:p>
      <text:p text:style-name="P1"><text:span text:style-name="Source_20_Text">taskflow_backend/urls.py</text:span></text:p>
      <text:p text:style-name="Text_20_body">Added:</text:p>
      <text:p text:style-name="P1"><text:span text:style-name="Source_20_Text">path("api/tasks/", include("tasks.urls"))</text:span></text:p>
      <text:p text:style-name="Text_20_body">Now all task APIs are connected under:</text:p>
      <text:p text:style-name="P1"><text:span text:style-name="Source_20_Text">/api/tasks/</text:span></text:p>
      <text:p text:style-name="Horizontal_20_Line"/>
      <text:h text:style-name="Heading_20_1" text:outline-level="1">11. Task Database Migration Completed</text:h>
      <text:p text:style-name="Text_20_body"><text:span text:style-name="T1">S</text:span>uccessfully ran:</text:p>
      <text:p text:style-name="P1"><text:span text:style-name="Source_20_Text">python manage.py makemigrations tasks</text:span></text:p>
      <text:h text:style-name="Heading_20_3" text:outline-level="3">Status</text:h>
      <text:p text:style-name="P1"><text:span text:style-name="Source_20_Text">Output was OK</text:span></text:p>
      <text:p text:style-name="Text_20_body">Then:</text:p>
      <text:p text:style-name="P1"><text:span text:style-name="Source_20_Text">python manage.py migrate</text:span></text:p>
      <text:h text:style-name="Heading_20_3" text:outline-level="3">Status</text:h>
      <text:p text:style-name="P1"><text:span text:style-name="Source_20_Text">Output was OK</text:span></text:p>
      <text:p text:style-name="Text_20_body">This confirms the <text:span text:style-name="Source_20_Text">Task</text:span> table was created successfully in PostgreSQL.</text:p>
      <text:p text:style-name="Horizontal_20_Line"/>
      <text:p text:style-name="Text_20_body"/>
      <text:p text:style-name="Text_20_body"/>
      <text:p text:style-name="Text_20_body"/>
      <text:p text:style-name="Text_20_body"/>
      <text:h text:style-name="Heading_20_1" text:outline-level="1"><text:soft-page-break/>12. Admin Task Creation Tested Successfully</text:h>
      <text:p text:style-name="Text_20_body">API tested:</text:p>
      <text:p text:style-name="P1"><text:span text:style-name="Source_20_Text">POST /api/tasks/</text:span></text:p>
      <text:h text:style-name="Heading_20_3" text:outline-level="3">Result</text:h>
      <text:p text:style-name="P1"><text:span text:style-name="Source_20_Text">Expected output was received.</text:span></text:p>
      <text:p text:style-name="Text_20_body">This confirms:</text:p>
      <text:p text:style-name="Preformatted_20_Text"><text:span text:style-name="Source_20_Text">Admin can create tasks.</text:span></text:p>
      <text:p text:style-name="Preformatted_20_Text"><text:span text:style-name="Source_20_Text">Admin can assign task to user.</text:span></text:p>
      <text:p text:style-name="Preformatted_20_Text"><text:span text:style-name="Source_20_Text">Task is saved in PostgreSQL.</text:span></text:p>
      <text:p text:style-name="Preformatted_20_Text"><text:span text:style-name="Source_20_Text">JWT authentication works for task creation.</text:span></text:p>
      <text:p text:style-name="P1"><text:span text:style-name="Source_20_Text">Role validation is working.</text:span></text:p>
      <text:p text:style-name="Horizontal_20_Line"/>
      <text:h text:style-name="Heading_20_1" text:outline-level="1">13. User Task Status Update Tested Successfully</text:h>
      <text:p text:style-name="Text_20_body">API tested:</text:p>
      <text:p text:style-name="P1"><text:span text:style-name="Source_20_Text">PATCH /api/tasks/&lt;id&gt;/status/</text:span></text:p>
      <text:h text:style-name="Heading_20_3" text:outline-level="3">Result</text:h>
      <text:p text:style-name="P1"><text:span text:style-name="Source_20_Text">Expected output was received.</text:span></text:p>
      <text:p text:style-name="Text_20_body">This confirms:</text:p>
      <text:p text:style-name="Preformatted_20_Text"><text:span text:style-name="Source_20_Text">User can update assigned task status.</text:span></text:p>
      <text:p text:style-name="Preformatted_20_Text"><text:span text:style-name="Source_20_Text">User cannot update full task details.</text:span></text:p>
      <text:p text:style-name="Preformatted_20_Text"><text:span text:style-name="Source_20_Text">Task status update logic works.</text:span></text:p>
      <text:p text:style-name="P1"><text:span text:style-name="Source_20_Text">JWT authentication works for task status update.</text:span></text:p>
      <text:p text:style-name="Horizontal_20_Line"/>
      <text:p text:style-name="Text_20_body"/>
      <text:p text:style-name="Text_20_body"/>
      <text:p text:style-name="Text_20_body"/>
      <text:p text:style-name="Text_20_body"/>
      <text:p text:style-name="Text_20_body"/>
      <text:h text:style-name="Heading_20_1" text:outline-level="1"><text:soft-page-break/>Backend APIs Completed So Far</text:h>
      <text:h text:style-name="Heading_20_2" text:outline-level="2">Authentication APIs</text:h>
      <text:p text:style-name="Preformatted_20_Text"><text:span text:style-name="Source_20_Text">POST /api/auth/register/</text:span></text:p>
      <text:p text:style-name="Preformatted_20_Text"><text:span text:style-name="Source_20_Text">POST /api/auth/login/</text:span></text:p>
      <text:p text:style-name="Preformatted_20_Text"><text:span text:style-name="Source_20_Text">POST /api/auth/token/refresh/</text:span></text:p>
      <text:p text:style-name="Preformatted_20_Text"><text:span text:style-name="Source_20_Text">GET <text:s/>/api/auth/profile/</text:span></text:p>
      <text:p text:style-name="P1"><text:span text:style-name="Source_20_Text">GET <text:s/>/api/auth/users/</text:span></text:p>
      <text:h text:style-name="Heading_20_2" text:outline-level="2">Task APIs</text:h>
      <text:p text:style-name="Preformatted_20_Text"><text:span text:style-name="Source_20_Text">GET <text:s text:c="3"/>/api/tasks/</text:span></text:p>
      <text:p text:style-name="Preformatted_20_Text"><text:span text:style-name="Source_20_Text">POST <text:s text:c="2"/>/api/tasks/</text:span></text:p>
      <text:p text:style-name="Preformatted_20_Text"><text:span text:style-name="Source_20_Text">GET <text:s text:c="3"/>/api/tasks/&lt;id&gt;/</text:span></text:p>
      <text:p text:style-name="Preformatted_20_Text"><text:span text:style-name="Source_20_Text">PUT <text:s text:c="3"/>/api/tasks/&lt;id&gt;/</text:span></text:p>
      <text:p text:style-name="Preformatted_20_Text"><text:span text:style-name="Source_20_Text">PATCH <text:s/>/api/tasks/&lt;id&gt;/</text:span></text:p>
      <text:p text:style-name="Preformatted_20_Text"><text:span text:style-name="Source_20_Text">DELETE /api/tasks/&lt;id&gt;/</text:span></text:p>
      <text:p text:style-name="P1"><text:span text:style-name="Source_20_Text">PATCH <text:s/>/api/tasks/&lt;id&gt;/status/</text:span></text:p>
      <text:p text:style-name="Horizontal_20_Line"/>
      <text:h text:style-name="Heading_20_1" text:outline-level="1">Completed Backend Features So Far</text:h>
      <text:p text:style-name="Preformatted_20_Text"><text:span text:style-name="Source_20_Text">Django backend setup</text:span></text:p>
      <text:p text:style-name="Preformatted_20_Text"><text:span text:style-name="Source_20_Text">PostgreSQL database connection</text:span></text:p>
      <text:p text:style-name="Preformatted_20_Text"><text:span text:style-name="Source_20_Text">Custom user model</text:span></text:p>
      <text:p text:style-name="Preformatted_20_Text"><text:span text:style-name="Source_20_Text">Admin/User roles</text:span></text:p>
      <text:p text:style-name="Preformatted_20_Text"><text:span text:style-name="Source_20_Text">JWT authentication</text:span></text:p>
      <text:p text:style-name="Preformatted_20_Text"><text:span text:style-name="Source_20_Text">User registration</text:span></text:p>
      <text:p text:style-name="Preformatted_20_Text"><text:span text:style-name="Source_20_Text">Login with access and refresh tokens</text:span></text:p>
      <text:p text:style-name="Preformatted_20_Text"><text:span text:style-name="Source_20_Text">Profile API</text:span></text:p>
      <text:p text:style-name="Preformatted_20_Text"><text:span text:style-name="Source_20_Text">Admin-only user list API</text:span></text:p>
      <text:p text:style-name="Preformatted_20_Text"><text:span text:style-name="Source_20_Text">Task model</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filtering</text:span></text:p>
      <text:p text:style-name="Preformatted_20_Text"><text:span text:style-name="Source_20_Text">Task status update</text:span></text:p>
      <text:p text:style-name="Preformatted_20_Text"><text:span text:style-name="Source_20_Text">Role-based permissions</text:span></text:p>
      <text:p text:style-name="Preformatted_20_Text"><text:span text:style-name="Source_20_Text">Database indexing</text:span></text:p>
      <text:p text:style-name="P1"><text:span text:style-name="Source_20_Text">Django admin integration</text:span></text:p>
      <text:p text:style-name="Horizontal_20_Line"/>
      <text:h text:style-name="Heading_20_1" text:outline-level="1">Current Completion Status</text:h>
      <text:p text:style-name="Preformatted_20_Text"><text:span text:style-name="Source_20_Text">Backend foundation <text:s text:c="7"/>: Completed</text:span></text:p>
      <text:p text:style-name="Preformatted_20_Text"><text:span text:style-name="Source_20_Text">Authentication module <text:s text:c="4"/>: Completed</text:span></text:p>
      <text:p text:style-name="Preformatted_20_Text"><text:span text:style-name="Source_20_Text">User management APIs <text:s text:c="5"/>: Completed</text:span></text:p>
      <text:p text:style-name="Preformatted_20_Text"><text:span text:style-name="Source_20_Text">Task management APIs <text:s text:c="5"/>: Completed</text:span></text:p>
      <text:p text:style-name="Preformatted_20_Text"><text:span text:style-name="Source_20_Text">Role-based access control : Completed</text:span></text:p>
      <text:p text:style-name="P1"><text:span text:style-name="Source_20_Text">Database model/indexing <text:s text:c="2"/>: Completed</text:span></text:p>
      <text:p text:style-name="Horizontal_20_Line"/>
      <text:h text:style-name="Heading_20_1" text:outline-level="1"><text:soft-page-break/>Next Section</text:h>
      <text:p text:style-name="Text_20_body">Now <text:span text:style-name="T1">moving</text:span> to:</text:p>
      <text:p text:style-name="P1"><text:span text:style-name="Source_20_Text">Dashboard APIs</text:span></text:p>
      <text:p text:style-name="Text_20_body">We will create:</text:p>
      <text:p text:style-name="Preformatted_20_Text"><text:span text:style-name="Source_20_Text">GET /api/dashboard/admin/</text:span></text:p>
      <text:p text:style-name="P1"><text:span text:style-name="Source_20_Text">GET /api/dashboard/user/</text:span></text:p>
      <text:h text:style-name="Heading_20_3" text:outline-level="3">Admin Dashboard Will Return</text:h>
      <text:p text:style-name="Preformatted_20_Text"><text:span text:style-name="Source_20_Text">Total users</text:span></text:p>
      <text:p text:style-name="Preformatted_20_Text"><text:span text:style-name="Source_20_Text">Total tasks</text:span></text:p>
      <text:p text:style-name="Preformatted_20_Text"><text:span text:style-name="Source_20_Text">Pending tasks</text:span></text:p>
      <text:p text:style-name="Preformatted_20_Text"><text:span text:style-name="Source_20_Text">In-progress tasks</text:span></text:p>
      <text:p text:style-name="Preformatted_20_Text"><text:span text:style-name="Source_20_Text">Completed tasks</text:span></text:p>
      <text:p text:style-name="P1"><text:span text:style-name="Source_20_Text">High priority tasks</text:span></text:p>
      <text:h text:style-name="Heading_20_3" text:outline-level="3">User Dashboard Will Return</text:h>
      <text:p text:style-name="Preformatted_20_Text"><text:span text:style-name="Source_20_Text">My total tasks</text:span></text:p>
      <text:p text:style-name="Preformatted_20_Text"><text:span text:style-name="Source_20_Text">My pending tasks</text:span></text:p>
      <text:p text:style-name="Preformatted_20_Text"><text:span text:style-name="Source_20_Text">My in-progress tasks</text:span></text:p>
      <text:p text:style-name="Preformatted_20_Text"><text:span text:style-name="Source_20_Text">My completed tasks</text:span></text:p>
      <text:p text:style-name="Preformatted_20_Text"><text:span text:style-name="Source_20_Text">My high priority tasks</text:span></text:p>
      <text:p text:style-name="P1"><text:span text:style-name="Source_20_Text">Upcoming due task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Great. Dashboard APIs are completed and verified.</text:p>
      <text:h text:style-name="Heading_20_2" text:outline-level="2">Documentation — Dashboard API Section Completed</text:h>
      <text:h text:style-name="Heading_20_3" text:outline-level="3">Current Backend Location</text:h>
      <text:p text:style-name="P1"><text:span text:style-name="Source_20_Text">~/Downloads/All_Gits/taskflow/backend</text:span></text:p>
      <text:p text:style-name="Horizontal_20_Line"/>
      <text:h text:style-name="Heading_20_1" text:outline-level="1">1. Dashboard App Updated</text:h>
      <text:p text:style-name="Text_20_body">Worked inside the existing Django app:</text:p>
      <text:p text:style-name="P1"><text:span text:style-name="Source_20_Text">dashboard/</text:span></text:p>
      <text:p text:style-name="Text_20_body">This app is responsible for summary statistics used in the frontend dashboard pages.</text:p>
      <text:p text:style-name="Horizontal_20_Line"/>
      <text:h text:style-name="Heading_20_1" text:outline-level="1">2. Dashboard Views Created</text:h>
      <text:p text:style-name="Text_20_body"><text:span text:style-name="T2">U</text:span>pdated:</text:p>
      <text:p text:style-name="P1"><text:span text:style-name="Source_20_Text">dashboard/views.py</text:span></text:p>
      <text:h text:style-name="Heading_20_3" text:outline-level="3">Views Added</text:h>
      <text:p text:style-name="Preformatted_20_Text"><text:span text:style-name="Source_20_Text">AdminDashboardView</text:span></text:p>
      <text:p text:style-name="Preformatted_20_Text"><text:span text:style-name="Source_20_Text">UserDashboardView</text:span></text:p>
      <text:p text:style-name="P1"><text:span text:style-name="Source_20_Text">IsAdminRole</text:span></text:p>
      <text:p text:style-name="Horizontal_20_Line"/>
      <text:h text:style-name="Heading_20_1" text:outline-level="1">3. Admin Dashboard API Created</text:h>
      <text:h text:style-name="Heading_20_3" text:outline-level="3">Endpoint</text:h>
      <text:p text:style-name="P1"><text:span text:style-name="Source_20_Text">GET /api/dashboard/admin/</text:span></text:p>
      <text:h text:style-name="Heading_20_3" text:outline-level="3">Access</text:h>
      <text:p text:style-name="P1"><text:span text:style-name="Source_20_Text">ADMIN only</text:span></text:p>
      <text:h text:style-name="Heading_20_3" text:outline-level="3">Data Returned</text:h>
      <text:p text:style-name="Text_20_body">The admin dashboard returns complete project-level statistics:</text:p>
      <text:p text:style-name="Preformatted_20_Text"><text:span text:style-name="Source_20_Text">total_users</text:span></text:p>
      <text:p text:style-name="Preformatted_20_Text"><text:span text:style-name="Source_20_Text">total_admins</text:span></text:p>
      <text:p text:style-name="Preformatted_20_Text"><text:span text:style-name="Source_20_Text">total_tasks</text:span></text:p>
      <text:p text:style-name="Preformatted_20_Text"><text:span text:style-name="Source_20_Text">pending_tasks</text:span></text:p>
      <text:p text:style-name="Preformatted_20_Text"><text:soft-page-break/><text:span text:style-name="Source_20_Text">in_progress_tasks</text:span></text:p>
      <text:p text:style-name="Preformatted_20_Text"><text:span text:style-name="Source_20_Text">completed_tasks</text:span></text:p>
      <text:p text:style-name="Preformatted_20_Text"><text:span text:style-name="Source_20_Text">high_priority_tasks</text:span></text:p>
      <text:p text:style-name="P1"><text:span text:style-name="Source_20_Text">overdue_tasks</text:span></text:p>
      <text:h text:style-name="Heading_20_3" text:outline-level="3">Purpose</text:h>
      <text:p text:style-name="Text_20_body">This API will power the Admin dashboard cards in React.</text:p>
      <text:p text:style-name="Text_20_body">Example dashboard cards later:</text:p>
      <text:p text:style-name="Preformatted_20_Text"><text:span text:style-name="Source_20_Text">Total Users</text:span></text:p>
      <text:p text:style-name="Preformatted_20_Text"><text:span text:style-name="Source_20_Text">Total Tasks</text:span></text:p>
      <text:p text:style-name="Preformatted_20_Text"><text:span text:style-name="Source_20_Text">Pending Tasks</text:span></text:p>
      <text:p text:style-name="Preformatted_20_Text"><text:span text:style-name="Source_20_Text">In Progress Tasks</text:span></text:p>
      <text:p text:style-name="Preformatted_20_Text"><text:span text:style-name="Source_20_Text">Completed Tasks</text:span></text:p>
      <text:p text:style-name="Preformatted_20_Text"><text:span text:style-name="Source_20_Text">High Priority Tasks</text:span></text:p>
      <text:p text:style-name="P1"><text:span text:style-name="Source_20_Text">Overdue Tasks</text:span></text:p>
      <text:p text:style-name="Horizontal_20_Line"/>
      <text:h text:style-name="Heading_20_1" text:outline-level="1">4. User Dashboard API Created</text:h>
      <text:h text:style-name="Heading_20_3" text:outline-level="3">Endpoint</text:h>
      <text:p text:style-name="P1"><text:span text:style-name="Source_20_Text">GET /api/dashboard/user/</text:span></text:p>
      <text:h text:style-name="Heading_20_3" text:outline-level="3">Access</text:h>
      <text:p text:style-name="P1"><text:span text:style-name="Source_20_Text">Authenticated users</text:span></text:p>
      <text:h text:style-name="Heading_20_3" text:outline-level="3">Data Returned</text:h>
      <text:p text:style-name="Text_20_body">The user dashboard returns only the logged-in user’s task statistics:</text:p>
      <text:p text:style-name="Preformatted_20_Text"><text:span text:style-name="Source_20_Text">total_tasks</text:span></text:p>
      <text:p text:style-name="Preformatted_20_Text"><text:span text:style-name="Source_20_Text">pending_tasks</text:span></text:p>
      <text:p text:style-name="Preformatted_20_Text"><text:span text:style-name="Source_20_Text">in_progress_tasks</text:span></text:p>
      <text:p text:style-name="Preformatted_20_Text"><text:span text:style-name="Source_20_Text">completed_tasks</text:span></text:p>
      <text:p text:style-name="Preformatted_20_Text"><text:span text:style-name="Source_20_Text">high_priority_tasks</text:span></text:p>
      <text:p text:style-name="P1"><text:span text:style-name="Source_20_Text">upcoming_due_tasks</text:span></text:p>
      <text:h text:style-name="Heading_20_3" text:outline-level="3">Purpose</text:h>
      <text:p text:style-name="Text_20_body">This API will power the User dashboard page in React.</text:p>
      <text:p text:style-name="Text_20_body">Example dashboard cards later:</text:p>
      <text:p text:style-name="Preformatted_20_Text"><text:span text:style-name="Source_20_Text">My Total Tasks</text:span></text:p>
      <text:p text:style-name="Preformatted_20_Text"><text:span text:style-name="Source_20_Text">My Pending Tasks</text:span></text:p>
      <text:p text:style-name="Preformatted_20_Text"><text:span text:style-name="Source_20_Text">My In-Progress Tasks</text:span></text:p>
      <text:p text:style-name="Preformatted_20_Text"><text:span text:style-name="Source_20_Text">My Completed Tasks</text:span></text:p>
      <text:p text:style-name="Preformatted_20_Text"><text:span text:style-name="Source_20_Text">My High Priority Tasks</text:span></text:p>
      <text:p text:style-name="P1"><text:span text:style-name="Source_20_Text">Upcoming Due Tasks</text:span></text:p>
      <text:p text:style-name="Horizontal_20_Line"/>
      <text:h text:style-name="Heading_20_1" text:outline-level="1"><text:soft-page-break/>5. Upcoming Due Tasks Logic Added</text:h>
      <text:p text:style-name="Text_20_body">For the user dashboard, <text:span text:style-name="T2">A</text:span>dded logic to return the next five upcoming tasks:</text:p>
      <text:p text:style-name="P1"><text:span text:style-name="Source_20_Text">upcoming_due_tasks</text:span></text:p>
      <text:p text:style-name="Text_20_body">The logic:</text:p>
      <text:p text:style-name="Preformatted_20_Text"><text:span text:style-name="Source_20_Text">Only tasks assigned to the logged-in user</text:span></text:p>
      <text:p text:style-name="Preformatted_20_Text"><text:span text:style-name="Source_20_Text">Due date greater than or equal to today</text:span></text:p>
      <text:p text:style-name="Preformatted_20_Text"><text:span text:style-name="Source_20_Text">Completed tasks excluded</text:span></text:p>
      <text:p text:style-name="Preformatted_20_Text"><text:span text:style-name="Source_20_Text">Sorted by due date</text:span></text:p>
      <text:p text:style-name="P1"><text:span text:style-name="Source_20_Text">Limited to 5 tasks</text:span></text:p>
      <text:p text:style-name="Text_20_body">This makes the dashboard more practical.</text:p>
      <text:p text:style-name="Horizontal_20_Line"/>
      <text:h text:style-name="Heading_20_1" text:outline-level="1">6. Overdue Task Logic Added</text:h>
      <text:p text:style-name="Text_20_body">For the admin dashboard, we added:</text:p>
      <text:p text:style-name="P1"><text:span text:style-name="Source_20_Text">overdue_tasks</text:span></text:p>
      <text:p text:style-name="Text_20_body">The logic:</text:p>
      <text:p text:style-name="Preformatted_20_Text"><text:span text:style-name="Source_20_Text">Tasks with due_date before today</text:span></text:p>
      <text:p text:style-name="P1"><text:span text:style-name="Source_20_Text">Completed tasks excluded</text:span></text:p>
      <text:p text:style-name="Text_20_body">This helps show useful business logic, not just basic CRUD.</text:p>
      <text:p text:style-name="Horizontal_20_Line"/>
      <text:h text:style-name="Heading_20_1" text:outline-level="1">7. Dashboard URLs Created</text:h>
      <text:p text:style-name="Text_20_body"><text:span text:style-name="T2">C</text:span>reated:</text:p>
      <text:p text:style-name="P1"><text:span text:style-name="Source_20_Text">dashboard/urls.py</text:span></text:p>
      <text:h text:style-name="Heading_20_3" text:outline-level="3">Routes Added</text:h>
      <text:p text:style-name="Preformatted_20_Text"><text:span text:style-name="Source_20_Text">GET /api/dashboard/admin/</text:span></text:p>
      <text:p text:style-name="P1"><text:span text:style-name="Source_20_Text">GET /api/dashboard/user/</text:span></text:p>
      <text:p text:style-name="Horizontal_20_Line"/>
      <text:p text:style-name="Text_20_body"/>
      <text:p text:style-name="Text_20_body"/>
      <text:p text:style-name="Text_20_body"/>
      <text:p text:style-name="Text_20_body"/>
      <text:h text:style-name="Heading_20_1" text:outline-level="1"><text:soft-page-break/>8. Main URL Routing Updated</text:h>
      <text:p text:style-name="Text_20_body"><text:span text:style-name="T2">U</text:span>pdated:</text:p>
      <text:p text:style-name="P1"><text:span text:style-name="Source_20_Text">taskflow_backend/urls.py</text:span></text:p>
      <text:p text:style-name="Text_20_body">Added:</text:p>
      <text:p text:style-name="P1"><text:span text:style-name="Source_20_Text">path("api/dashboard/", include("dashboard.urls"))</text:span></text:p>
      <text:p text:style-name="Text_20_body">So dashboard APIs are now available under:</text:p>
      <text:p text:style-name="P1"><text:span text:style-name="Source_20_Text">/api/dashboard/</text:span></text:p>
      <text:p text:style-name="Horizontal_20_Line"/>
      <text:h text:style-name="Heading_20_1" text:outline-level="1">9. Dashboard Permissions Verified</text:h>
      <text:h text:style-name="Heading_20_3" text:outline-level="3">Admin Dashboard Permission</text:h>
      <text:p text:style-name="Text_20_body">The admin dashboard is protected using:</text:p>
      <text:p text:style-name="P1"><text:span text:style-name="Source_20_Text">IsAuthenticated + IsAdminRole</text:span></text:p>
      <text:p text:style-name="Text_20_body">This means only logged-in users with role:</text:p>
      <text:p text:style-name="P1"><text:span text:style-name="Source_20_Text">ADMIN</text:span></text:p>
      <text:p text:style-name="Text_20_body">can access:</text:p>
      <text:p text:style-name="P1"><text:span text:style-name="Source_20_Text">/api/dashboard/admin/</text:span></text:p>
      <text:p text:style-name="Horizontal_20_Line"/>
      <text:h text:style-name="Heading_20_3" text:outline-level="3">User Dashboard Permission</text:h>
      <text:p text:style-name="Text_20_body">The user dashboard uses:</text:p>
      <text:p text:style-name="P1"><text:span text:style-name="Source_20_Text">IsAuthenticated</text:span></text:p>
      <text:p text:style-name="Text_20_body">This means any logged-in user can access their own dashboard data.</text:p>
      <text:p text:style-name="Text_20_body">For regular users, it shows their assigned task data.</text:p>
      <text:p text:style-name="Text_20_body">For admin users, it shows tasks assigned to the admin, which may be zero.</text:p>
      <text:p text:style-name="Horizontal_20_Line"/>
      <text:p text:style-name="Text_20_body"/>
      <text:p text:style-name="Text_20_body"/>
      <text:p text:style-name="Text_20_body"/>
      <text:h text:style-name="Heading_20_1" text:outline-level="1"><text:soft-page-break/>10. API Testing Completed</text:h>
      <text:p text:style-name="Text_20_body"><text:span text:style-name="T2">T</text:span>ested these APIs successfully:</text:p>
      <text:h text:style-name="Heading_20_2" text:outline-level="2">Admin Dashboard</text:h>
      <text:p text:style-name="P1"><text:span text:style-name="Source_20_Text">GET /api/dashboard/admin/</text:span></text:p>
      <text:h text:style-name="Heading_20_3" text:outline-level="3">Result</text:h>
      <text:p text:style-name="P1"><text:span text:style-name="Source_20_Text">Expected response received.</text:span></text:p>
      <text:p text:style-name="Text_20_body">Confirmed:</text:p>
      <text:p text:style-name="P1"><text:span text:style-name="Source_20_Text">Admin can access full dashboard statistics.</text:span></text:p>
      <text:p text:style-name="Horizontal_20_Line"/>
      <text:h text:style-name="Heading_20_2" text:outline-level="2">User Dashboard</text:h>
      <text:p text:style-name="P1"><text:span text:style-name="Source_20_Text">GET /api/dashboard/user/</text:span></text:p>
      <text:h text:style-name="Heading_20_3" text:outline-level="3">Result</text:h>
      <text:p text:style-name="P1"><text:span text:style-name="Source_20_Text">Expected response received.</text:span></text:p>
      <text:p text:style-name="Text_20_body">Confirmed:</text:p>
      <text:p text:style-name="P1"><text:span text:style-name="Source_20_Text">User can access personal task dashboard.</text:span></text:p>
      <text:p text:style-name="Horizontal_20_Line"/>
      <text:h text:style-name="Heading_20_2" text:outline-level="2">User Trying Admin Dashboard</text:h>
      <text:p text:style-name="P1"><text:span text:style-name="Source_20_Text">GET /api/dashboard/admin/</text:span></text:p>
      <text:h text:style-name="Heading_20_3" text:outline-level="3">Result</text:h>
      <text:p text:style-name="P1"><text:span text:style-name="Source_20_Text">Expected permission-denied response received.</text:span></text:p>
      <text:p text:style-name="Text_20_body">Confirmed:</text:p>
      <text:p text:style-name="Preformatted_20_Text"><text:span text:style-name="Source_20_Text">User cannot access admin dashboard.</text:span></text:p>
      <text:p text:style-name="P1"><text:span text:style-name="Source_20_Text">Role-based access control is working correctly.</text:span></text:p>
      <text:p text:style-name="Horizontal_20_Line"/>
      <text:p text:style-name="Text_20_body"/>
      <text:p text:style-name="Text_20_body"/>
      <text:h text:style-name="Heading_20_1" text:outline-level="1"><text:soft-page-break/>APIs Completed So Far</text:h>
      <text:h text:style-name="Heading_20_2" text:outline-level="2">Authentication APIs</text:h>
      <text:p text:style-name="Preformatted_20_Text"><text:span text:style-name="Source_20_Text">POST /api/auth/register/</text:span></text:p>
      <text:p text:style-name="Preformatted_20_Text"><text:span text:style-name="Source_20_Text">POST /api/auth/login/</text:span></text:p>
      <text:p text:style-name="Preformatted_20_Text"><text:span text:style-name="Source_20_Text">POST /api/auth/token/refresh/</text:span></text:p>
      <text:p text:style-name="Preformatted_20_Text"><text:span text:style-name="Source_20_Text">GET <text:s/>/api/auth/profile/</text:span></text:p>
      <text:p text:style-name="P1"><text:span text:style-name="Source_20_Text">GET <text:s/>/api/auth/users/</text:span></text:p>
      <text:h text:style-name="Heading_20_2" text:outline-level="2">Task APIs</text:h>
      <text:p text:style-name="Preformatted_20_Text"><text:span text:style-name="Source_20_Text">GET <text:s text:c="3"/>/api/tasks/</text:span></text:p>
      <text:p text:style-name="Preformatted_20_Text"><text:span text:style-name="Source_20_Text">POST <text:s text:c="2"/>/api/tasks/</text:span></text:p>
      <text:p text:style-name="Preformatted_20_Text"><text:span text:style-name="Source_20_Text">GET <text:s text:c="3"/>/api/tasks/&lt;id&gt;/</text:span></text:p>
      <text:p text:style-name="Preformatted_20_Text"><text:span text:style-name="Source_20_Text">PUT <text:s text:c="3"/>/api/tasks/&lt;id&gt;/</text:span></text:p>
      <text:p text:style-name="Preformatted_20_Text"><text:span text:style-name="Source_20_Text">PATCH <text:s/>/api/tasks/&lt;id&gt;/</text:span></text:p>
      <text:p text:style-name="Preformatted_20_Text"><text:span text:style-name="Source_20_Text">DELETE /api/tasks/&lt;id&gt;/</text:span></text:p>
      <text:p text:style-name="P1"><text:span text:style-name="Source_20_Text">PATCH <text:s/>/api/tasks/&lt;id&gt;/status/</text:span></text:p>
      <text:h text:style-name="Heading_20_2" text:outline-level="2">Dashboard APIs</text:h>
      <text:p text:style-name="Preformatted_20_Text"><text:span text:style-name="Source_20_Text">GET /api/dashboard/admin/</text:span></text:p>
      <text:p text:style-name="P1"><text:span text:style-name="Source_20_Text">GET /api/dashboard/user/</text:span></text:p>
      <text:p text:style-name="Horizontal_20_Line"/>
      <text:h text:style-name="Heading_20_1" text:outline-level="1">Backend Features Completed So Far</text:h>
      <text:p text:style-name="Preformatted_20_Text"><text:span text:style-name="Source_20_Text">Django backend setup</text:span></text:p>
      <text:p text:style-name="Preformatted_20_Text"><text:span text:style-name="Source_20_Text">PostgreSQL database connection</text:span></text:p>
      <text:p text:style-name="Preformatted_20_Text"><text:span text:style-name="Source_20_Text">Environment variable setup</text:span></text:p>
      <text:p text:style-name="Preformatted_20_Text"><text:span text:style-name="Source_20_Text">Custom user model</text:span></text:p>
      <text:p text:style-name="Preformatted_20_Text"><text:span text:style-name="Source_20_Text">Admin/User role system</text:span></text:p>
      <text:p text:style-name="Preformatted_20_Text"><text:span text:style-name="Source_20_Text">JWT authentication</text:span></text:p>
      <text:p text:style-name="Preformatted_20_Text"><text:span text:style-name="Source_20_Text">User registration</text:span></text:p>
      <text:p text:style-name="Preformatted_20_Text"><text:span text:style-name="Source_20_Text">Login with access and refresh tokens</text:span></text:p>
      <text:p text:style-name="Preformatted_20_Text"><text:span text:style-name="Source_20_Text">Profile API</text:span></text:p>
      <text:p text:style-name="Preformatted_20_Text"><text:span text:style-name="Source_20_Text">Admin-only user list API</text:span></text:p>
      <text:p text:style-name="Preformatted_20_Text"><text:span text:style-name="Source_20_Text">Task model</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filtering</text:span></text:p>
      <text:p text:style-name="Preformatted_20_Text"><text:span text:style-name="Source_20_Text">Task status update</text:span></text:p>
      <text:p text:style-name="Preformatted_20_Text"><text:span text:style-name="Source_20_Text">Role-based task permissions</text:span></text:p>
      <text:p text:style-name="Preformatted_20_Text"><text:span text:style-name="Source_20_Text">Dashboard APIs</text:span></text:p>
      <text:p text:style-name="Preformatted_20_Text"><text:span text:style-name="Source_20_Text">Admin dashboard statistics</text:span></text:p>
      <text:p text:style-name="Preformatted_20_Text"><text:span text:style-name="Source_20_Text">User dashboard statistics</text:span></text:p>
      <text:p text:style-name="Preformatted_20_Text"><text:span text:style-name="Source_20_Text">Django admin integration</text:span></text:p>
      <text:p text:style-name="P1"><text:span text:style-name="Source_20_Text">Database indexing</text:span></text:p>
      <text:p text:style-name="Horizontal_20_Line"/>
      <text:h text:style-name="Heading_20_1" text:outline-level="1"><text:soft-page-break/>Current Backend Completion Status</text:h>
      <text:p text:style-name="Preformatted_20_Text"><text:span text:style-name="Source_20_Text">Authentication module <text:s text:c="7"/>: Completed</text:span></text:p>
      <text:p text:style-name="Preformatted_20_Text"><text:span text:style-name="Source_20_Text">User management APIs <text:s text:c="8"/>: Completed</text:span></text:p>
      <text:p text:style-name="Preformatted_20_Text"><text:span text:style-name="Source_20_Text">Task management APIs <text:s text:c="8"/>: Completed</text:span></text:p>
      <text:p text:style-name="Preformatted_20_Text"><text:span text:style-name="Source_20_Text">Dashboard APIs <text:s text:c="14"/>: Completed</text:span></text:p>
      <text:p text:style-name="Preformatted_20_Text"><text:span text:style-name="Source_20_Text">Role-based access control <text:s text:c="3"/>: Completed</text:span></text:p>
      <text:p text:style-name="Preformatted_20_Text"><text:span text:style-name="Source_20_Text">Database model/indexing <text:s text:c="5"/>: Completed</text:span></text:p>
      <text:p text:style-name="P1"><text:span text:style-name="Source_20_Text">Manual API testing with curl : Completed</text:span></text:p>
      <text:p text:style-name="Horizontal_20_Line"/>
      <text:h text:style-name="Heading_20_1" text:outline-level="1">Pending Major Sections</text:h>
      <text:p text:style-name="Preformatted_20_Text"><text:span text:style-name="Source_20_Text">Redis + Celery async email notifications</text:span></text:p>
      <text:p text:style-name="Preformatted_20_Text"><text:span text:style-name="Source_20_Text">React.js frontend</text:span></text:p>
      <text:p text:style-name="Preformatted_20_Text"><text:span text:style-name="Source_20_Text">Postman collection</text:span></text:p>
      <text:p text:style-name="Preformatted_20_Text"><text:span text:style-name="Source_20_Text">Backend tests with PyTest/Unittest</text:span></text:p>
      <text:p text:style-name="Preformatted_20_Text"><text:span text:style-name="Source_20_Text">Docker setup</text:span></text:p>
      <text:p text:style-name="Preformatted_20_Text"><text:span text:style-name="Source_20_Text">Gunicorn + Nginx</text:span></text:p>
      <text:p text:style-name="Preformatted_20_Text"><text:span text:style-name="Source_20_Text">AWS EC2 deployment</text:span></text:p>
      <text:p text:style-name="Preformatted_20_Text"><text:span text:style-name="Source_20_Text">GitHub Actions CI/CD</text:span></text:p>
      <text:p text:style-name="P1"><text:span text:style-name="Source_20_Text">README documentation</text:span></text:p>
      <text:p text:style-name="Horizontal_20_Line"/>
      <text:h text:style-name="Heading_20_1" text:outline-level="1">Next Section</text:h>
      <text:p text:style-name="Text_20_body">Now <text:span text:style-name="T2">moving</text:span> to:</text:p>
      <text:p text:style-name="P1"><text:span text:style-name="Source_20_Text">Redis + Celery async email notifications</text:span></text:p>
      <text:p text:style-name="Text_20_body">Will add:</text:p>
      <text:p text:style-name="Preformatted_20_Text"><text:span text:style-name="Source_20_Text">Celery configuration</text:span></text:p>
      <text:p text:style-name="Preformatted_20_Text"><text:span text:style-name="Source_20_Text">Redis broker connection</text:span></text:p>
      <text:p text:style-name="Preformatted_20_Text"><text:span text:style-name="Source_20_Text">Email backend configuration</text:span></text:p>
      <text:p text:style-name="Preformatted_20_Text"><text:span text:style-name="Source_20_Text">Async task assignment notification</text:span></text:p>
      <text:p text:style-name="P1"><text:span text:style-name="Source_20_Text">Optional pending task summary background job</text:span></text:p>
      <text:p text:style-name="Text_20_body">After this, whenever an admin creates a task, Celery will trigger an email notification asynchronous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ocumentation — Redis + Celery Async Email Notification Completed</text:h>
      <text:h text:style-name="Heading_20_3" text:outline-level="3">Current Backend Location</text:h>
      <text:p text:style-name="P1"><text:span text:style-name="Source_20_Text">~/Downloads/All_Gits/taskflow/backend</text:span></text:p>
      <text:p text:style-name="Horizontal_20_Line"/>
      <text:h text:style-name="Heading_20_1" text:outline-level="1">1. Redis Verified</text:h>
      <text:p text:style-name="Text_20_body"><text:span text:style-name="T3">C</text:span>onfirmed Redis is installed and running.</text:p>
      <text:h text:style-name="Heading_20_3" text:outline-level="3">Commands Used</text:h>
      <text:p text:style-name="Preformatted_20_Text"><text:span text:style-name="Source_20_Text">sudo systemctl status redis-server</text:span></text:p>
      <text:p text:style-name="P1"><text:span text:style-name="Source_20_Text">redis-cli ping</text:span></text:p>
      <text:h text:style-name="Heading_20_3" text:outline-level="3">Expected Redis Response</text:h>
      <text:p text:style-name="P1"><text:span text:style-name="Source_20_Text">PONG</text:span></text:p>
      <text:p text:style-name="Text_20_body">This confirms Redis is available as the message broker for Celery.</text:p>
      <text:p text:style-name="Horizontal_20_Line"/>
      <text:h text:style-name="Heading_20_1" text:outline-level="1">2. Environment Variables Updated</text:h>
      <text:p text:style-name="Text_20_body"><text:span text:style-name="T3">U</text:span>pdated:</text:p>
      <text:p text:style-name="P1"><text:span text:style-name="Source_20_Text">backend/.env</text:span></text:p>
      <text:h text:style-name="Heading_20_3" text:outline-level="3">Added Celery and Email Settings</text:h>
      <text:p text:style-name="Preformatted_20_Text"><text:span text:style-name="Source_20_Text">CELERY_BROKER_URL=redis://localhost:6379/0</text:span></text:p>
      <text:p text:style-name="Preformatted_20_Text"><text:span text:style-name="Source_20_Text">CELERY_RESULT_BACKEND=redis://localhost:6379/0</text:span></text:p>
      <text:p text:style-name="Preformatted_20_Text"><text:span text:style-name="Source_20_Text">EMAIL_BACKEND=django.core.mail.backends.console.EmailBackend</text:span></text:p>
      <text:p text:style-name="P1"><text:span text:style-name="Source_20_Text">DEFAULT_FROM_EMAIL=noreply@taskflow.local</text:span></text:p>
      <text:h text:style-name="Heading_20_3" text:outline-level="3">Purpose</text:h>
      <text:p text:style-name="Preformatted_20_Text"><text:span text:style-name="Source_20_Text">CELERY_BROKER_URL <text:s text:c="4"/>: Redis URL used by Celery to receive jobs</text:span></text:p>
      <text:p text:style-name="Preformatted_20_Text"><text:span text:style-name="Source_20_Text">CELERY_RESULT_BACKEND : Redis URL used to store Celery task results</text:span></text:p>
      <text:p text:style-name="Preformatted_20_Text"><text:span text:style-name="Source_20_Text">EMAIL_BACKEND <text:s text:c="8"/>: Prints emails in terminal during development</text:span></text:p>
      <text:p text:style-name="P1"><text:span text:style-name="Source_20_Text">DEFAULT_FROM_EMAIL <text:s text:c="3"/>: Sender email used in task notifications</text:span></text:p>
      <text:p text:style-name="Horizontal_20_Line"/>
      <text:p text:style-name="Text_20_body"/>
      <text:h text:style-name="Heading_20_1" text:outline-level="1"><text:soft-page-break/>3. Django Settings Updated for Celery</text:h>
      <text:p text:style-name="Text_20_body"><text:span text:style-name="T3">U</text:span>pdated:</text:p>
      <text:p text:style-name="P1"><text:span text:style-name="Source_20_Text">taskflow_backend/settings.py</text:span></text:p>
      <text:h text:style-name="Heading_20_3" text:outline-level="3">Configurations Added</text:h>
      <text:p text:style-name="Preformatted_20_Text"><text:span text:style-name="Source_20_Text">CELERY_BROKER_URL</text:span></text:p>
      <text:p text:style-name="Preformatted_20_Text"><text:span text:style-name="Source_20_Text">CELERY_RESULT_BACKEND</text:span></text:p>
      <text:p text:style-name="Preformatted_20_Text"><text:span text:style-name="Source_20_Text">CELERY_ACCEPT_CONTENT</text:span></text:p>
      <text:p text:style-name="Preformatted_20_Text"><text:span text:style-name="Source_20_Text">CELERY_TASK_SERIALIZER</text:span></text:p>
      <text:p text:style-name="Preformatted_20_Text"><text:span text:style-name="Source_20_Text">CELERY_RESULT_SERIALIZER</text:span></text:p>
      <text:p text:style-name="Preformatted_20_Text"><text:span text:style-name="Source_20_Text">CELERY_TIMEZONE</text:span></text:p>
      <text:p text:style-name="Preformatted_20_Text"><text:span text:style-name="Source_20_Text">EMAIL_BACKEND</text:span></text:p>
      <text:p text:style-name="P1"><text:span text:style-name="Source_20_Text">DEFAULT_FROM_EMAIL</text:span></text:p>
      <text:h text:style-name="Heading_20_3" text:outline-level="3">Purpose</text:h>
      <text:p text:style-name="Text_20_body">This connects Django settings with Celery and Redis.</text:p>
      <text:p text:style-name="Text_20_body">It also configures email notifications for local development.</text:p>
      <text:p text:style-name="Horizontal_20_Line"/>
      <text:h text:style-name="Heading_20_1" text:outline-level="1">4. Celery App Created</text:h>
      <text:p text:style-name="Text_20_body"><text:span text:style-name="T3">C</text:span>reated:</text:p>
      <text:p text:style-name="P1"><text:span text:style-name="Source_20_Text">taskflow_backend/celery.py</text:span></text:p>
      <text:h text:style-name="Heading_20_3" text:outline-level="3">Purpose</text:h>
      <text:p text:style-name="Text_20_body">This file initializes the Celery application for the Django project.</text:p>
      <text:p text:style-name="Text_20_body">It does three important things:</text:p>
      <text:p text:style-name="Preformatted_20_Text"><text:span text:style-name="Source_20_Text">Loads Django settings</text:span></text:p>
      <text:p text:style-name="Preformatted_20_Text"><text:span text:style-name="Source_20_Text">Configures Celery using Django settings</text:span></text:p>
      <text:p text:style-name="P1"><text:span text:style-name="Source_20_Text">Auto-discovers Celery tasks from Django apps</text:span></text:p>
      <text:p text:style-name="Horizontal_20_Line"/>
      <text:p text:style-name="Text_20_body"/>
      <text:p text:style-name="Text_20_body"/>
      <text:p text:style-name="Text_20_body"/>
      <text:p text:style-name="Text_20_body"/>
      <text:p text:style-name="Text_20_body"/>
      <text:p text:style-name="Text_20_body"/>
      <text:h text:style-name="Heading_20_1" text:outline-level="1"><text:soft-page-break/>5. Project Init Updated</text:h>
      <text:p text:style-name="Text_20_body"><text:span text:style-name="T3">U</text:span>pdated:</text:p>
      <text:p text:style-name="P1"><text:span text:style-name="Source_20_Text">taskflow_backend/__init__.py</text:span></text:p>
      <text:h text:style-name="Heading_20_3" text:outline-level="3">Added</text:h>
      <text:p text:style-name="Preformatted_20_Text"><text:span text:style-name="Source_20_Text">from .celery import app as celery_app</text:span></text:p>
      <text:p text:style-name="Preformatted_20_Text"/>
      <text:p text:style-name="P1"><text:span text:style-name="Source_20_Text">__all__ = ("celery_app",)</text:span></text:p>
      <text:h text:style-name="Heading_20_3" text:outline-level="3">Purpose</text:h>
      <text:p text:style-name="Text_20_body">This makes Celery load automatically when the Django project starts.</text:p>
      <text:p text:style-name="Horizontal_20_Line"/>
      <text:h text:style-name="Heading_20_1" text:outline-level="1">6. Celery Task Created</text:h>
      <text:p text:style-name="Text_20_body"><text:span text:style-name="T3">C</text:span>reated:</text:p>
      <text:p text:style-name="P1"><text:span text:style-name="Source_20_Text">tasks/tasks.py</text:span></text:p>
      <text:h text:style-name="Heading_20_3" text:outline-level="3">Task Added</text:h>
      <text:p text:style-name="P1"><text:span text:style-name="Source_20_Text">send_task_assignment_email</text:span></text:p>
      <text:h text:style-name="Heading_20_3" text:outline-level="3">Purpose</text:h>
      <text:p text:style-name="Text_20_body">This task sends an email notification when a new task is assigned to a user.</text:p>
      <text:p text:style-name="Text_20_body">It accepts:</text:p>
      <text:p text:style-name="Preformatted_20_Text"><text:span text:style-name="Source_20_Text">task_id</text:span></text:p>
      <text:p text:style-name="Preformatted_20_Text"><text:span text:style-name="Source_20_Text">task_title</text:span></text:p>
      <text:p text:style-name="Preformatted_20_Text"><text:span text:style-name="Source_20_Text">assigned_to_email</text:span></text:p>
      <text:p text:style-name="P1"><text:span text:style-name="Source_20_Text">assigned_to_username</text:span></text:p>
      <text:h text:style-name="Heading_20_3" text:outline-level="3">Email Content Includes</text:h>
      <text:p text:style-name="Preformatted_20_Text"><text:span text:style-name="Source_20_Text">Task ID</text:span></text:p>
      <text:p text:style-name="Preformatted_20_Text"><text:span text:style-name="Source_20_Text">Task title</text:span></text:p>
      <text:p text:style-name="Preformatted_20_Text"><text:span text:style-name="Source_20_Text">Assigned user name</text:span></text:p>
      <text:p text:style-name="P1"><text:span text:style-name="Source_20_Text">TaskFlow login reminder</text:span></text:p>
      <text:p text:style-name="Horizontal_20_Line"/>
      <text:p text:style-name="Text_20_body"/>
      <text:p text:style-name="Text_20_body"/>
      <text:h text:style-name="Heading_20_1" text:outline-level="1"><text:soft-page-break/>7. Task Creation API Connected to Celery</text:h>
      <text:p text:style-name="Text_20_body"><text:span text:style-name="T3">U</text:span>pdated:</text:p>
      <text:p text:style-name="P1"><text:span text:style-name="Source_20_Text">tasks/views.py</text:span></text:p>
      <text:p text:style-name="Text_20_body">Inside the task creation flow, after the task is saved, <text:span text:style-name="T3">A</text:span>dded:</text:p>
      <text:p text:style-name="Preformatted_20_Text"><text:span text:style-name="Source_20_Text">send_task_assignment_email.delay(</text:span></text:p>
      <text:p text:style-name="Preformatted_20_Text"><text:span text:style-name="Source_20_Text"><text:s text:c="4"/>task.id,</text:span></text:p>
      <text:p text:style-name="Preformatted_20_Text"><text:span text:style-name="Source_20_Text"><text:s text:c="4"/>task.title,</text:span></text:p>
      <text:p text:style-name="Preformatted_20_Text"><text:span text:style-name="Source_20_Text"><text:s text:c="4"/>task.assigned_to.email,</text:span></text:p>
      <text:p text:style-name="Preformatted_20_Text"><text:span text:style-name="Source_20_Text"><text:s text:c="4"/>task.assigned_to.username,</text:span></text:p>
      <text:p text:style-name="P1"><text:span text:style-name="Source_20_Text">)</text:span></text:p>
      <text:h text:style-name="Heading_20_3" text:outline-level="3">Why <text:span text:style-name="Source_20_Text">.delay()</text:span> Is Important</text:h>
      <text:p text:style-name="Text_20_body"><text:span text:style-name="Source_20_Text">.delay()</text:span> sends the email job to Celery asynchronously.</text:p>
      <text:p text:style-name="Text_20_body">That means:</text:p>
      <text:p text:style-name="Preformatted_20_Text"><text:span text:style-name="Source_20_Text">The API does not wait for email sending to finish.</text:span></text:p>
      <text:p text:style-name="Preformatted_20_Text"><text:span text:style-name="Source_20_Text">The task is created immediately.</text:span></text:p>
      <text:p text:style-name="Preformatted_20_Text"><text:span text:style-name="Source_20_Text">Celery processes the email in the background.</text:span></text:p>
      <text:p text:style-name="P1"><text:span text:style-name="Source_20_Text">Redis acts as the queue between Django and Celery.</text:span></text:p>
      <text:p text:style-name="Text_20_body">This is exactly what “async background task processing” means.</text:p>
      <text:p text:style-name="Horizontal_20_Line"/>
      <text:h text:style-name="Heading_20_1" text:outline-level="1">8. Django System Check Passed</text:h>
      <text:p text:style-name="Text_20_body"><text:span text:style-name="T3">R</text:span>an:</text:p>
      <text:p text:style-name="P1"><text:span text:style-name="Source_20_Text">python manage.py check</text:span></text:p>
      <text:h text:style-name="Heading_20_3" text:outline-level="3">Result</text:h>
      <text:p text:style-name="P1"><text:span text:style-name="Source_20_Text">Expected output received.</text:span></text:p>
      <text:p text:style-name="Text_20_body">This confirms:</text:p>
      <text:p text:style-name="Preformatted_20_Text"><text:span text:style-name="Source_20_Text">Django settings are valid.</text:span></text:p>
      <text:p text:style-name="Preformatted_20_Text"><text:span text:style-name="Source_20_Text">Celery imports are not breaking Django.</text:span></text:p>
      <text:p text:style-name="Preformatted_20_Text"><text:span text:style-name="Source_20_Text">Task app imports are valid.</text:span></text:p>
      <text:p text:style-name="P1"><text:span text:style-name="Source_20_Text">No configuration errors detected.</text:span></text:p>
      <text:p text:style-name="Horizontal_20_Line"/>
      <text:p text:style-name="Text_20_body"/>
      <text:p text:style-name="Text_20_body"/>
      <text:p text:style-name="Text_20_body"/>
      <text:h text:style-name="Heading_20_1" text:outline-level="1"><text:soft-page-break/>9. Celery Worker Started Successfully</text:h>
      <text:p text:style-name="Text_20_body"><text:span text:style-name="T3">R</text:span>an:</text:p>
      <text:p text:style-name="P1"><text:span text:style-name="Source_20_Text">celery -A taskflow_backend worker -l info</text:span></text:p>
      <text:h text:style-name="Heading_20_3" text:outline-level="3">Result</text:h>
      <text:p text:style-name="P1"><text:span text:style-name="Source_20_Text">Expected output received.</text:span></text:p>
      <text:p text:style-name="Text_20_body">The worker showed the registered task:</text:p>
      <text:p text:style-name="P1"><text:span text:style-name="Source_20_Text">tasks.tasks.send_task_assignment_email</text:span></text:p>
      <text:p text:style-name="Text_20_body">This confirms Celery successfully discovered our async task.</text:p>
      <text:p text:style-name="Horizontal_20_Line"/>
      <text:h text:style-name="Heading_20_1" text:outline-level="1">10. Async Email Notification Tested</text:h>
      <text:p text:style-name="Text_20_body"><text:span text:style-name="T3">C</text:span>reated a new task using:</text:p>
      <text:p text:style-name="P1"><text:span text:style-name="Source_20_Text">POST /api/tasks/</text:span></text:p>
      <text:h text:style-name="Heading_20_3" text:outline-level="3">Result</text:h>
      <text:p text:style-name="P1"><text:span text:style-name="Source_20_Text">Expected task creation response received.</text:span></text:p>
      <text:p text:style-name="Text_20_body">Then Celery processed the job.</text:p>
      <text:h text:style-name="Heading_20_3" text:outline-level="3">Email Output</text:h>
      <text:p text:style-name="P1"><text:span text:style-name="Source_20_Text">Expected email content printed in terminal.</text:span></text:p>
      <text:p text:style-name="Text_20_body">This confirms:</text:p>
      <text:p text:style-name="Preformatted_20_Text"><text:span text:style-name="Source_20_Text">Task creation API works.</text:span></text:p>
      <text:p text:style-name="Preformatted_20_Text"><text:span text:style-name="Source_20_Text">Celery receives the background job.</text:span></text:p>
      <text:p text:style-name="Preformatted_20_Text"><text:span text:style-name="Source_20_Text">Redis queue is working.</text:span></text:p>
      <text:p text:style-name="Preformatted_20_Text"><text:span text:style-name="Source_20_Text">Email notification logic is working.</text:span></text:p>
      <text:p text:style-name="P1"><text:span text:style-name="Source_20_Text">The API and worker are connected correctly.</text:span></text:p>
      <text:p text:style-name="Horizontal_20_Line"/>
      <text:p text:style-name="Text_20_body"/>
      <text:p text:style-name="Text_20_body"/>
      <text:p text:style-name="Text_20_body"/>
      <text:p text:style-name="Text_20_body"/>
      <text:h text:style-name="Heading_20_1" text:outline-level="1"><text:soft-page-break/>Backend Features Completed After This Section</text:h>
      <text:p text:style-name="Preformatted_20_Text"><text:span text:style-name="Source_20_Text">Django backend setup</text:span></text:p>
      <text:p text:style-name="Preformatted_20_Text"><text:span text:style-name="Source_20_Text">PostgreSQL database connection</text:span></text:p>
      <text:p text:style-name="Preformatted_20_Text"><text:span text:style-name="Source_20_Text">Custom user model</text:span></text:p>
      <text:p text:style-name="Preformatted_20_Text"><text:span text:style-name="Source_20_Text">Admin/User roles</text:span></text:p>
      <text:p text:style-name="Preformatted_20_Text"><text:span text:style-name="Source_20_Text">JWT authentication</text:span></text:p>
      <text:p text:style-name="Preformatted_20_Text"><text:span text:style-name="Source_20_Text">User registration</text:span></text:p>
      <text:p text:style-name="Preformatted_20_Text"><text:span text:style-name="Source_20_Text">Login with access and refresh tokens</text:span></text:p>
      <text:p text:style-name="Preformatted_20_Text"><text:span text:style-name="Source_20_Text">Profile API</text:span></text:p>
      <text:p text:style-name="Preformatted_20_Text"><text:span text:style-name="Source_20_Text">Admin-only user list API</text:span></text:p>
      <text:p text:style-name="Preformatted_20_Text"><text:span text:style-name="Source_20_Text">Task model</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filtering</text:span></text:p>
      <text:p text:style-name="Preformatted_20_Text"><text:span text:style-name="Source_20_Text">Task status update</text:span></text:p>
      <text:p text:style-name="Preformatted_20_Text"><text:span text:style-name="Source_20_Text">Dashboard APIs</text:span></text:p>
      <text:p text:style-name="Preformatted_20_Text"><text:span text:style-name="Source_20_Text">Redis broker setup</text:span></text:p>
      <text:p text:style-name="Preformatted_20_Text"><text:span text:style-name="Source_20_Text">Celery worker setup</text:span></text:p>
      <text:p text:style-name="Preformatted_20_Text"><text:span text:style-name="Source_20_Text">Async task assignment email notification</text:span></text:p>
      <text:p text:style-name="Preformatted_20_Text"><text:span text:style-name="Source_20_Text">Console email backend</text:span></text:p>
      <text:p text:style-name="Preformatted_20_Text"><text:span text:style-name="Source_20_Text">Role-based access control</text:span></text:p>
      <text:p text:style-name="Preformatted_20_Text"><text:span text:style-name="Source_20_Text">Database indexing</text:span></text:p>
      <text:p text:style-name="P1"><text:span text:style-name="Source_20_Text">Django admin integration</text:span></text:p>
      <text:p text:style-name="Horizontal_20_Line"/>
      <text:h text:style-name="Heading_20_1" text:outline-level="1">APIs Completed So Far</text:h>
      <text:h text:style-name="Heading_20_2" text:outline-level="2">Authentication APIs</text:h>
      <text:p text:style-name="Preformatted_20_Text"><text:span text:style-name="Source_20_Text">POST /api/auth/register/</text:span></text:p>
      <text:p text:style-name="Preformatted_20_Text"><text:span text:style-name="Source_20_Text">POST /api/auth/login/</text:span></text:p>
      <text:p text:style-name="Preformatted_20_Text"><text:span text:style-name="Source_20_Text">POST /api/auth/token/refresh/</text:span></text:p>
      <text:p text:style-name="Preformatted_20_Text"><text:span text:style-name="Source_20_Text">GET <text:s/>/api/auth/profile/</text:span></text:p>
      <text:p text:style-name="P1"><text:span text:style-name="Source_20_Text">GET <text:s/>/api/auth/users/</text:span></text:p>
      <text:h text:style-name="Heading_20_2" text:outline-level="2">Task APIs</text:h>
      <text:p text:style-name="Preformatted_20_Text"><text:span text:style-name="Source_20_Text">GET <text:s text:c="3"/>/api/tasks/</text:span></text:p>
      <text:p text:style-name="Preformatted_20_Text"><text:span text:style-name="Source_20_Text">POST <text:s text:c="2"/>/api/tasks/</text:span></text:p>
      <text:p text:style-name="Preformatted_20_Text"><text:span text:style-name="Source_20_Text">GET <text:s text:c="3"/>/api/tasks/&lt;id&gt;/</text:span></text:p>
      <text:p text:style-name="Preformatted_20_Text"><text:span text:style-name="Source_20_Text">PUT <text:s text:c="3"/>/api/tasks/&lt;id&gt;/</text:span></text:p>
      <text:p text:style-name="Preformatted_20_Text"><text:span text:style-name="Source_20_Text">PATCH <text:s/>/api/tasks/&lt;id&gt;/</text:span></text:p>
      <text:p text:style-name="Preformatted_20_Text"><text:span text:style-name="Source_20_Text">DELETE /api/tasks/&lt;id&gt;/</text:span></text:p>
      <text:p text:style-name="P1"><text:span text:style-name="Source_20_Text">PATCH <text:s/>/api/tasks/&lt;id&gt;/status/</text:span></text:p>
      <text:h text:style-name="Heading_20_2" text:outline-level="2">Dashboard APIs</text:h>
      <text:p text:style-name="Preformatted_20_Text"><text:span text:style-name="Source_20_Text">GET /api/dashboard/admin/</text:span></text:p>
      <text:p text:style-name="P1"><text:span text:style-name="Source_20_Text">GET /api/dashboard/user/</text:span></text:p>
      <text:p text:style-name="Horizontal_20_Line"/>
      <text:h text:style-name="Heading_20_1" text:outline-level="1"><text:soft-page-break/>Current Backend Completion Status</text:h>
      <text:p text:style-name="Preformatted_20_Text"><text:span text:style-name="Source_20_Text">Backend API foundation <text:s text:c="5"/>: Completed</text:span></text:p>
      <text:p text:style-name="Preformatted_20_Text"><text:span text:style-name="Source_20_Text">Authentication module <text:s text:c="6"/>: Completed</text:span></text:p>
      <text:p text:style-name="Preformatted_20_Text"><text:span text:style-name="Source_20_Text">User management <text:s text:c="12"/>: Completed</text:span></text:p>
      <text:p text:style-name="Preformatted_20_Text"><text:span text:style-name="Source_20_Text">Task management <text:s text:c="12"/>: Completed</text:span></text:p>
      <text:p text:style-name="Preformatted_20_Text"><text:span text:style-name="Source_20_Text">Dashboard APIs <text:s text:c="13"/>: Completed</text:span></text:p>
      <text:p text:style-name="Preformatted_20_Text"><text:span text:style-name="Source_20_Text">Redis + Celery <text:s text:c="13"/>: Completed</text:span></text:p>
      <text:p text:style-name="Preformatted_20_Text"><text:span text:style-name="Source_20_Text">Async email notification <text:s text:c="3"/>: Completed</text:span></text:p>
      <text:p text:style-name="P1"><text:span text:style-name="Source_20_Text">Manual curl testing <text:s text:c="8"/>: Completed</text:span></text:p>
      <text:p text:style-name="Horizontal_20_Line"/>
      <text:h text:style-name="Heading_20_1" text:outline-level="1">Pending Sections</text:h>
      <text:p text:style-name="Preformatted_20_Text"><text:span text:style-name="Source_20_Text">React.js frontend</text:span></text:p>
      <text:p text:style-name="Preformatted_20_Text"><text:span text:style-name="Source_20_Text">Frontend API integration</text:span></text:p>
      <text:p text:style-name="Preformatted_20_Text"><text:span text:style-name="Source_20_Text">Protected routes</text:span></text:p>
      <text:p text:style-name="Preformatted_20_Text"><text:span text:style-name="Source_20_Text">Admin dashboard UI</text:span></text:p>
      <text:p text:style-name="Preformatted_20_Text"><text:span text:style-name="Source_20_Text">User dashboard UI</text:span></text:p>
      <text:p text:style-name="Preformatted_20_Text"><text:span text:style-name="Source_20_Text">Task list UI</text:span></text:p>
      <text:p text:style-name="Preformatted_20_Text"><text:span text:style-name="Source_20_Text">Task creation UI</text:span></text:p>
      <text:p text:style-name="Preformatted_20_Text"><text:span text:style-name="Source_20_Text">Status update UI</text:span></text:p>
      <text:p text:style-name="Preformatted_20_Text"><text:span text:style-name="Source_20_Text">Postman collection</text:span></text:p>
      <text:p text:style-name="Preformatted_20_Text"><text:span text:style-name="Source_20_Text">Backend tests with PyTest/Unittest</text:span></text:p>
      <text:p text:style-name="Preformatted_20_Text"><text:span text:style-name="Source_20_Text">Docker setup</text:span></text:p>
      <text:p text:style-name="Preformatted_20_Text"><text:span text:style-name="Source_20_Text">Gunicorn + Nginx</text:span></text:p>
      <text:p text:style-name="Preformatted_20_Text"><text:span text:style-name="Source_20_Text">AWS EC2 deployment</text:span></text:p>
      <text:p text:style-name="Preformatted_20_Text"><text:span text:style-name="Source_20_Text">GitHub Actions CI/CD</text:span></text:p>
      <text:p text:style-name="P1"><text:span text:style-name="Source_20_Text">README documentation</text:span></text:p>
      <text:p text:style-name="Horizontal_20_Line"/>
      <text:h text:style-name="Heading_20_1" text:outline-level="1">Next Section</text:h>
      <text:p text:style-name="Text_20_body">Now mov<text:span text:style-name="T3">ing</text:span> to the frontend:</text:p>
      <text:p text:style-name="P1"><text:span text:style-name="Source_20_Text">React.js + Vite frontend setup</text:span></text:p>
      <text:p text:style-name="Text_20_body">Will create:</text:p>
      <text:p text:style-name="Preformatted_20_Text"><text:span text:style-name="Source_20_Text">Login page</text:span></text:p>
      <text:p text:style-name="Preformatted_20_Text"><text:span text:style-name="Source_20_Text">Auth context</text:span></text:p>
      <text:p text:style-name="Preformatted_20_Text"><text:span text:style-name="Source_20_Text">Protected routes</text:span></text:p>
      <text:p text:style-name="Preformatted_20_Text"><text:span text:style-name="Source_20_Text">Admin dashboard</text:span></text:p>
      <text:p text:style-name="Preformatted_20_Text"><text:span text:style-name="Source_20_Text">User dashboard</text:span></text:p>
      <text:p text:style-name="Preformatted_20_Text"><text:span text:style-name="Source_20_Text">Task list page</text:span></text:p>
      <text:p text:style-name="Preformatted_20_Text"><text:span text:style-name="Source_20_Text">Task creation page</text:span></text:p>
      <text:p text:style-name="Preformatted_20_Text"><text:span text:style-name="Source_20_Text">Task status update</text:span></text:p>
      <text:p text:style-name="Preformatted_20_Text"><text:span text:style-name="Source_20_Text">Axios API integration</text:span></text:p>
      <text:p text:style-name="P1"><text:span text:style-name="Source_20_Text">Bootstrap layout</text:span></text:p>
      <text:p text:style-name="P1"><text:span text:style-name="Source_20_Text"/></text:p>
      <text:p text:style-name="P1"><text:span text:style-name="Source_20_Text"/></text:p>
      <text:p text:style-name="P1"><text:span text:style-name="Source_20_Text"/></text:p>
      <text:h text:style-name="Heading_20_2" text:outline-level="2"><text:soft-page-break/>Documentation — React Frontend Section Completed</text:h>
      <text:h text:style-name="Heading_20_3" text:outline-level="3">Frontend Location</text:h>
      <text:p text:style-name="P1"><text:span text:style-name="Source_20_Text">~/Downloads/All_Gits/taskflow/frontend</text:span></text:p>
      <text:p text:style-name="Horizontal_20_Line"/>
      <text:h text:style-name="Heading_20_1" text:outline-level="1">1. React App Created Using Vite</text:h>
      <text:p text:style-name="Text_20_body"><text:span text:style-name="T4">C</text:span>reated the frontend application using:</text:p>
      <text:p text:style-name="P1"><text:span text:style-name="Source_20_Text">npm create vite@latest . -- --template react</text:span></text:p>
      <text:p text:style-name="Text_20_body">Then installed dependencies:</text:p>
      <text:p text:style-name="Preformatted_20_Text"><text:span text:style-name="Source_20_Text">npm install</text:span></text:p>
      <text:p text:style-name="P1"><text:span text:style-name="Source_20_Text">npm install axios react-router-dom bootstrap</text:span></text:p>
      <text:h text:style-name="Heading_20_3" text:outline-level="3">Packages Used</text:h>
      <text:p text:style-name="Preformatted_20_Text"><text:span text:style-name="Source_20_Text">axios <text:s text:c="13"/>: API calls to Django backend</text:span></text:p>
      <text:p text:style-name="Preformatted_20_Text"><text:span text:style-name="Source_20_Text">react-router-dom <text:s text:c="2"/>: Frontend routing and protected pages</text:span></text:p>
      <text:p text:style-name="Preformatted_20_Text"><text:span text:style-name="Source_20_Text">bootstrap <text:s text:c="9"/>: Responsive UI styling</text:span></text:p>
      <text:p text:style-name="P1"><text:span text:style-name="Source_20_Text">vite <text:s text:c="14"/>: React development/build tool</text:span></text:p>
      <text:p text:style-name="Horizontal_20_Line"/>
      <text:h text:style-name="Heading_20_1" text:outline-level="1">2. Frontend Folder Structure Created</text:h>
      <text:p text:style-name="Text_20_body"><text:span text:style-name="T4">O</text:span>rganized the frontend like this:</text:p>
      <text:p text:style-name="Preformatted_20_Text"><text:span text:style-name="Source_20_Text">frontend/src/</text:span></text:p>
      <text:p text:style-name="Preformatted_20_Text"><text:span text:style-name="Source_20_Text">│</text:span></text:p>
      <text:p text:style-name="Preformatted_20_Text"><text:span text:style-name="Source_20_Text">├── api/</text:span></text:p>
      <text:p text:style-name="Preformatted_20_Text"><text:span text:style-name="Source_20_Text">│ <text:s text:c="2"/>└── axios.js</text:span></text:p>
      <text:p text:style-name="Preformatted_20_Text"><text:span text:style-name="Source_20_Text">│</text:span></text:p>
      <text:p text:style-name="Preformatted_20_Text"><text:span text:style-name="Source_20_Text">├── components/</text:span></text:p>
      <text:p text:style-name="Preformatted_20_Text"><text:span text:style-name="Source_20_Text">│ <text:s text:c="2"/>├── Navbar.jsx</text:span></text:p>
      <text:p text:style-name="Preformatted_20_Text"><text:span text:style-name="Source_20_Text">│ <text:s text:c="2"/>└── ProtectedRoute.jsx</text:span></text:p>
      <text:p text:style-name="Preformatted_20_Text"><text:span text:style-name="Source_20_Text">│</text:span></text:p>
      <text:p text:style-name="Preformatted_20_Text"><text:span text:style-name="Source_20_Text">├── context/</text:span></text:p>
      <text:p text:style-name="Preformatted_20_Text"><text:span text:style-name="Source_20_Text">│ <text:s text:c="2"/>└── AuthContext.jsx</text:span></text:p>
      <text:p text:style-name="Preformatted_20_Text"><text:span text:style-name="Source_20_Text">│</text:span></text:p>
      <text:p text:style-name="Preformatted_20_Text"><text:span text:style-name="Source_20_Text">├── pages/</text:span></text:p>
      <text:p text:style-name="Preformatted_20_Text"><text:span text:style-name="Source_20_Text">│ <text:s text:c="2"/>├── Login.jsx</text:span></text:p>
      <text:p text:style-name="Preformatted_20_Text"><text:span text:style-name="Source_20_Text">│ <text:s text:c="2"/>├── AdminDashboard.jsx</text:span></text:p>
      <text:p text:style-name="Preformatted_20_Text"><text:span text:style-name="Source_20_Text">│ <text:s text:c="2"/>├── UserDashboard.jsx</text:span></text:p>
      <text:p text:style-name="Preformatted_20_Text"><text:span text:style-name="Source_20_Text">│ <text:s text:c="2"/>├── TaskList.jsx</text:span></text:p>
      <text:p text:style-name="Preformatted_20_Text"><text:span text:style-name="Source_20_Text">│ <text:s text:c="2"/>└── TaskCreate.jsx</text:span></text:p>
      <text:p text:style-name="Preformatted_20_Text"><text:span text:style-name="Source_20_Text">│</text:span></text:p>
      <text:p text:style-name="Preformatted_20_Text"><text:span text:style-name="Source_20_Text">├── App.jsx</text:span></text:p>
      <text:p text:style-name="Preformatted_20_Text"><text:span text:style-name="Source_20_Text">├── main.jsx</text:span></text:p>
      <text:p text:style-name="P1"><text:span text:style-name="Source_20_Text">└── index.css</text:span></text:p>
      <text:p text:style-name="Text_20_body">This structure keeps API logic, authentication, reusable components, and pages separated cleanly.</text:p>
      <text:p text:style-name="Horizontal_20_Line"/>
      <text:h text:style-name="Heading_20_1" text:outline-level="1"><text:soft-page-break/>3. Axios API Configuration Added</text:h>
      <text:p text:style-name="Text_20_body"><text:span text:style-name="T4">C</text:span>reated:</text:p>
      <text:p text:style-name="P1"><text:span text:style-name="Source_20_Text">src/api/axios.js</text:span></text:p>
      <text:h text:style-name="Heading_20_3" text:outline-level="3">Purpose</text:h>
      <text:p text:style-name="Text_20_body">This file configures the backend base URL:</text:p>
      <text:p text:style-name="P1"><text:span text:style-name="Source_20_Text">http://127.0.0.1:8000/api</text:span></text:p>
      <text:p text:style-name="Text_20_body">It also automatically attaches the JWT access token to every protected request:</text:p>
      <text:p text:style-name="P1"><text:span text:style-name="Source_20_Text">Authorization: Bearer ACCESS_TOKEN</text:span></text:p>
      <text:h text:style-name="Heading_20_3" text:outline-level="3">Result</text:h>
      <text:p text:style-name="Text_20_body">Frontend can call protected Django APIs without manually adding tokens on every page.</text:p>
      <text:p text:style-name="Horizontal_20_Line"/>
      <text:h text:style-name="Heading_20_1" text:outline-level="1">4. Authentication Context Created</text:h>
      <text:p text:style-name="Text_20_body"><text:span text:style-name="T4">C</text:span>reated:</text:p>
      <text:p text:style-name="P1"><text:span text:style-name="Source_20_Text">src/context/AuthContext.jsx</text:span></text:p>
      <text:h text:style-name="Heading_20_3" text:outline-level="3">Features Added</text:h>
      <text:p text:style-name="Preformatted_20_Text"><text:span text:style-name="Source_20_Text">Login function</text:span></text:p>
      <text:p text:style-name="Preformatted_20_Text"><text:span text:style-name="Source_20_Text">Logout function</text:span></text:p>
      <text:p text:style-name="Preformatted_20_Text"><text:span text:style-name="Source_20_Text">Store logged-in user</text:span></text:p>
      <text:p text:style-name="Preformatted_20_Text"><text:span text:style-name="Source_20_Text">Store access token</text:span></text:p>
      <text:p text:style-name="Preformatted_20_Text"><text:span text:style-name="Source_20_Text">Store refresh token</text:span></text:p>
      <text:p text:style-name="Preformatted_20_Text"><text:span text:style-name="Source_20_Text">Load user from localStorage</text:span></text:p>
      <text:p text:style-name="P1"><text:span text:style-name="Source_20_Text">Authentication loading state</text:span></text:p>
      <text:h text:style-name="Heading_20_3" text:outline-level="3">Data Stored in Browser</text:h>
      <text:p text:style-name="Preformatted_20_Text"><text:span text:style-name="Source_20_Text">accessToken</text:span></text:p>
      <text:p text:style-name="Preformatted_20_Text"><text:span text:style-name="Source_20_Text">refreshToken</text:span></text:p>
      <text:p text:style-name="P1"><text:span text:style-name="Source_20_Text">user</text:span></text:p>
      <text:p text:style-name="Text_20_body">This allows the user session to remain active after page refresh.</text:p>
      <text:p text:style-name="Horizontal_20_Line"/>
      <text:p text:style-name="Text_20_body"/>
      <text:p text:style-name="Text_20_body"/>
      <text:p text:style-name="Text_20_body"/>
      <text:h text:style-name="Heading_20_1" text:outline-level="1"><text:soft-page-break/>5. Protected Route Component Created</text:h>
      <text:p text:style-name="Text_20_body"><text:span text:style-name="T4">C</text:span>reated:</text:p>
      <text:p text:style-name="P1"><text:span text:style-name="Source_20_Text">src/components/ProtectedRoute.jsx</text:span></text:p>
      <text:h text:style-name="Heading_20_3" text:outline-level="3">Purpose</text:h>
      <text:p text:style-name="Text_20_body">This protects pages from unauthorized access.</text:p>
      <text:h text:style-name="Heading_20_3" text:outline-level="3">Rules Implemented</text:h>
      <text:p text:style-name="Preformatted_20_Text"><text:span text:style-name="Source_20_Text">Unauthenticated users are redirected to /login.</text:span></text:p>
      <text:p text:style-name="Preformatted_20_Text"/>
      <text:p text:style-name="Preformatted_20_Text"><text:span text:style-name="Source_20_Text">ADMIN users can access:</text:span></text:p>
      <text:p text:style-name="Preformatted_20_Text"><text:span text:style-name="Source_20_Text">- /admin/dashboard</text:span></text:p>
      <text:p text:style-name="Preformatted_20_Text"><text:span text:style-name="Source_20_Text">- /tasks</text:span></text:p>
      <text:p text:style-name="Preformatted_20_Text"><text:span text:style-name="Source_20_Text">- /tasks/create</text:span></text:p>
      <text:p text:style-name="Preformatted_20_Text"/>
      <text:p text:style-name="Preformatted_20_Text"><text:span text:style-name="Source_20_Text">USER users can access:</text:span></text:p>
      <text:p text:style-name="Preformatted_20_Text"><text:span text:style-name="Source_20_Text">- /user/dashboard</text:span></text:p>
      <text:p text:style-name="Preformatted_20_Text"><text:span text:style-name="Source_20_Text">- /tasks</text:span></text:p>
      <text:p text:style-name="Preformatted_20_Text"/>
      <text:p text:style-name="Preformatted_20_Text"><text:span text:style-name="Source_20_Text">USER users cannot access:</text:span></text:p>
      <text:p text:style-name="Preformatted_20_Text"><text:span text:style-name="Source_20_Text">- /tasks/create</text:span></text:p>
      <text:p text:style-name="P1"><text:span text:style-name="Source_20_Text">- /admin/dashboard</text:span></text:p>
      <text:p text:style-name="Text_20_body">This confirms frontend-level role-based routing is working.</text:p>
      <text:p text:style-name="Horizontal_20_Line"/>
      <text:h text:style-name="Heading_20_1" text:outline-level="1">6. Navbar Created</text:h>
      <text:p text:style-name="Text_20_body">We created:</text:p>
      <text:p text:style-name="P1"><text:span text:style-name="Source_20_Text">src/components/Navbar.jsx</text:span></text:p>
      <text:h text:style-name="Heading_20_3" text:outline-level="3">Admin Navbar Shows</text:h>
      <text:p text:style-name="Preformatted_20_Text"><text:span text:style-name="Source_20_Text">Dashboard</text:span></text:p>
      <text:p text:style-name="Preformatted_20_Text"><text:span text:style-name="Source_20_Text">Tasks</text:span></text:p>
      <text:p text:style-name="Preformatted_20_Text"><text:span text:style-name="Source_20_Text">Create Task</text:span></text:p>
      <text:p text:style-name="P1"><text:span text:style-name="Source_20_Text">Logout</text:span></text:p>
      <text:h text:style-name="Heading_20_3" text:outline-level="3">User Navbar Shows</text:h>
      <text:p text:style-name="Preformatted_20_Text"><text:span text:style-name="Source_20_Text">Dashboard</text:span></text:p>
      <text:p text:style-name="Preformatted_20_Text"><text:span text:style-name="Source_20_Text">My Tasks</text:span></text:p>
      <text:p text:style-name="P1"><text:span text:style-name="Source_20_Text">Logout</text:span></text:p>
      <text:h text:style-name="Heading_20_3" text:outline-level="3">Extra Info Displayed</text:h>
      <text:p text:style-name="Text_20_body">Navbar also shows:</text:p>
      <text:p text:style-name="Preformatted_20_Text"><text:span text:style-name="Source_20_Text">username</text:span></text:p>
      <text:p text:style-name="P1"><text:span text:style-name="Source_20_Text">role</text:span></text:p>
      <text:p text:style-name="Text_20_body"><text:soft-page-break/>This makes the UI clear during demo and testing.</text:p>
      <text:p text:style-name="Horizontal_20_Line"/>
      <text:h text:style-name="Heading_20_1" text:outline-level="1">7. Login Page Created</text:h>
      <text:p text:style-name="Text_20_body"><text:span text:style-name="T4">C</text:span>reated:</text:p>
      <text:p text:style-name="P1"><text:span text:style-name="Source_20_Text">src/pages/Login.jsx</text:span></text:p>
      <text:h text:style-name="Heading_20_3" text:outline-level="3">Features</text:h>
      <text:p text:style-name="Preformatted_20_Text"><text:span text:style-name="Source_20_Text">Username/password login form</text:span></text:p>
      <text:p text:style-name="Preformatted_20_Text"><text:span text:style-name="Source_20_Text">Error handling</text:span></text:p>
      <text:p text:style-name="Preformatted_20_Text"><text:span text:style-name="Source_20_Text">Loading state</text:span></text:p>
      <text:p text:style-name="Preformatted_20_Text"><text:span text:style-name="Source_20_Text">Role-based redirect after login</text:span></text:p>
      <text:p text:style-name="P1"><text:span text:style-name="Source_20_Text">Demo credentials displayed</text:span></text:p>
      <text:h text:style-name="Heading_20_3" text:outline-level="3">Login Redirect Logic</text:h>
      <text:p text:style-name="Preformatted_20_Text"><text:span text:style-name="Source_20_Text">ADMIN → /admin/dashboard</text:span></text:p>
      <text:p text:style-name="P1"><text:span text:style-name="Source_20_Text">USER <text:s/>→ /user/dashboard</text:span></text:p>
      <text:h text:style-name="Heading_20_3" text:outline-level="3">Tested Result</text:h>
      <text:p text:style-name="Preformatted_20_Text"><text:span text:style-name="Source_20_Text">Admin login worked.</text:span></text:p>
      <text:p text:style-name="P1"><text:span text:style-name="Source_20_Text">User login worked.</text:span></text:p>
      <text:p text:style-name="Horizontal_20_Line"/>
      <text:h text:style-name="Heading_20_1" text:outline-level="1">8. Admin Dashboard Page Created</text:h>
      <text:p text:style-name="Text_20_body"><text:span text:style-name="T4">C</text:span>reated:</text:p>
      <text:p text:style-name="P1"><text:span text:style-name="Source_20_Text">src/pages/AdminDashboard.jsx</text:span></text:p>
      <text:h text:style-name="Heading_20_3" text:outline-level="3">API Used</text:h>
      <text:p text:style-name="P1"><text:span text:style-name="Source_20_Text">GET /api/dashboard/admin/</text:span></text:p>
      <text:h text:style-name="Heading_20_3" text:outline-level="3">Dashboard Cards Display</text:h>
      <text:p text:style-name="Preformatted_20_Text"><text:span text:style-name="Source_20_Text">Total Users</text:span></text:p>
      <text:p text:style-name="Preformatted_20_Text"><text:span text:style-name="Source_20_Text">Total Admins</text:span></text:p>
      <text:p text:style-name="Preformatted_20_Text"><text:span text:style-name="Source_20_Text">Total Tasks</text:span></text:p>
      <text:p text:style-name="Preformatted_20_Text"><text:span text:style-name="Source_20_Text">Pending Tasks</text:span></text:p>
      <text:p text:style-name="Preformatted_20_Text"><text:span text:style-name="Source_20_Text">In Progress Tasks</text:span></text:p>
      <text:p text:style-name="Preformatted_20_Text"><text:span text:style-name="Source_20_Text">Completed Tasks</text:span></text:p>
      <text:p text:style-name="Preformatted_20_Text"><text:span text:style-name="Source_20_Text">High Priority Tasks</text:span></text:p>
      <text:p text:style-name="P1"><text:span text:style-name="Source_20_Text">Overdue Tasks</text:span></text:p>
      <text:h text:style-name="Heading_20_3" text:outline-level="3">Tested Result</text:h>
      <text:p text:style-name="P1"><text:span text:style-name="Source_20_Text">Admin dashboard loaded successfully.</text:span></text:p>
      <text:p text:style-name="Horizontal_20_Line"><text:soft-page-break/></text:p>
      <text:h text:style-name="Heading_20_1" text:outline-level="1">9. User Dashboard Page Created</text:h>
      <text:p text:style-name="Text_20_body"><text:span text:style-name="T4">C</text:span>reated:</text:p>
      <text:p text:style-name="P1"><text:span text:style-name="Source_20_Text">src/pages/UserDashboard.jsx</text:span></text:p>
      <text:h text:style-name="Heading_20_3" text:outline-level="3">API Used</text:h>
      <text:p text:style-name="P1"><text:span text:style-name="Source_20_Text">GET /api/dashboard/user/</text:span></text:p>
      <text:h text:style-name="Heading_20_3" text:outline-level="3">Dashboard Cards Display</text:h>
      <text:p text:style-name="Preformatted_20_Text"><text:span text:style-name="Source_20_Text">My Total Tasks</text:span></text:p>
      <text:p text:style-name="Preformatted_20_Text"><text:span text:style-name="Source_20_Text">Pending</text:span></text:p>
      <text:p text:style-name="Preformatted_20_Text"><text:span text:style-name="Source_20_Text">In Progress</text:span></text:p>
      <text:p text:style-name="Preformatted_20_Text"><text:span text:style-name="Source_20_Text">Completed</text:span></text:p>
      <text:p text:style-name="P1"><text:span text:style-name="Source_20_Text">High Priority</text:span></text:p>
      <text:h text:style-name="Heading_20_3" text:outline-level="3">Upcoming Tasks Table</text:h>
      <text:p text:style-name="Text_20_body">Displays:</text:p>
      <text:p text:style-name="Preformatted_20_Text"><text:span text:style-name="Source_20_Text">Task title</text:span></text:p>
      <text:p text:style-name="Preformatted_20_Text"><text:span text:style-name="Source_20_Text">Status</text:span></text:p>
      <text:p text:style-name="Preformatted_20_Text"><text:span text:style-name="Source_20_Text">Priority</text:span></text:p>
      <text:p text:style-name="P1"><text:span text:style-name="Source_20_Text">Due date</text:span></text:p>
      <text:h text:style-name="Heading_20_3" text:outline-level="3">Tested Result</text:h>
      <text:p text:style-name="P1"><text:span text:style-name="Source_20_Text">User dashboard loaded successfully after login.</text:span></text:p>
      <text:p text:style-name="Horizontal_20_Line"/>
      <text:h text:style-name="Heading_20_1" text:outline-level="1">10. Task List Page Created</text:h>
      <text:p text:style-name="Text_20_body"><text:span text:style-name="T4">C</text:span>reated:</text:p>
      <text:p text:style-name="P1"><text:span text:style-name="Source_20_Text">src/pages/TaskList.jsx</text:span></text:p>
      <text:h text:style-name="Heading_20_3" text:outline-level="3">API Used</text:h>
      <text:p text:style-name="Preformatted_20_Text"><text:span text:style-name="Source_20_Text">GET /api/tasks/</text:span></text:p>
      <text:p text:style-name="P1"><text:span text:style-name="Source_20_Text">PATCH /api/tasks/&lt;id&gt;/status/</text:span></text:p>
      <text:h text:style-name="Heading_20_3" text:outline-level="3">Features</text:h>
      <text:p text:style-name="Preformatted_20_Text"><text:span text:style-name="Source_20_Text">Admin can view all tasks.</text:span></text:p>
      <text:p text:style-name="Preformatted_20_Text"><text:span text:style-name="Source_20_Text">User can view only assigned tasks.</text:span></text:p>
      <text:p text:style-name="Preformatted_20_Text"><text:span text:style-name="Source_20_Text">Status filter added.</text:span></text:p>
      <text:p text:style-name="Preformatted_20_Text"><text:span text:style-name="Source_20_Text">Priority filter added.</text:span></text:p>
      <text:p text:style-name="Preformatted_20_Text"><text:span text:style-name="Source_20_Text">Status update dropdown added.</text:span></text:p>
      <text:p text:style-name="Preformatted_20_Text"><text:span text:style-name="Source_20_Text">Task title and description displayed.</text:span></text:p>
      <text:p text:style-name="Preformatted_20_Text"><text:span text:style-name="Source_20_Text">Assigned user displayed.</text:span></text:p>
      <text:p text:style-name="P1"><text:soft-page-break/><text:span text:style-name="Source_20_Text">Due date displayed.</text:span></text:p>
      <text:h text:style-name="Heading_20_3" text:outline-level="3">Tested Result</text:h>
      <text:p text:style-name="Preformatted_20_Text"><text:span text:style-name="Source_20_Text">Task list loaded successfully.</text:span></text:p>
      <text:p text:style-name="P1"><text:span text:style-name="Source_20_Text">User can update task status.</text:span></text:p>
      <text:p text:style-name="Horizontal_20_Line"/>
      <text:h text:style-name="Heading_20_1" text:outline-level="1">11. Task Create Page Created</text:h>
      <text:p text:style-name="Text_20_body"><text:span text:style-name="T4">C</text:span>reated:</text:p>
      <text:p text:style-name="P1"><text:span text:style-name="Source_20_Text">src/pages/TaskCreate.jsx</text:span></text:p>
      <text:h text:style-name="Heading_20_3" text:outline-level="3">APIs Used</text:h>
      <text:p text:style-name="Preformatted_20_Text"><text:span text:style-name="Source_20_Text">GET <text:s/>/api/auth/users/</text:span></text:p>
      <text:p text:style-name="P1"><text:span text:style-name="Source_20_Text">POST /api/tasks/</text:span></text:p>
      <text:h text:style-name="Heading_20_3" text:outline-level="3">Features</text:h>
      <text:p text:style-name="Preformatted_20_Text"><text:span text:style-name="Source_20_Text">Admin can create a task.</text:span></text:p>
      <text:p text:style-name="Preformatted_20_Text"><text:span text:style-name="Source_20_Text">Admin can assign task to USER role accounts.</text:span></text:p>
      <text:p text:style-name="Preformatted_20_Text"><text:span text:style-name="Source_20_Text">User dropdown loads from backend.</text:span></text:p>
      <text:p text:style-name="Preformatted_20_Text"><text:span text:style-name="Source_20_Text">Task title, description, status, priority, due date supported.</text:span></text:p>
      <text:p text:style-name="Preformatted_20_Text"><text:span text:style-name="Source_20_Text">After task creation, page redirects to task list.</text:span></text:p>
      <text:p text:style-name="P1"><text:span text:style-name="Source_20_Text">Celery email notification is triggered after task creation.</text:span></text:p>
      <text:h text:style-name="Heading_20_3" text:outline-level="3">Tested Result</text:h>
      <text:p text:style-name="P1"><text:span text:style-name="Source_20_Text">Create task worked successfully from frontend.</text:span></text:p>
      <text:p text:style-name="Horizontal_20_Line"/>
      <text:h text:style-name="Heading_20_1" text:outline-level="1">12. App Routing Configured</text:h>
      <text:p text:style-name="Text_20_body"><text:span text:style-name="T4">U</text:span>pdated:</text:p>
      <text:p text:style-name="P1"><text:span text:style-name="Source_20_Text">src/App.jsx</text:span></text:p>
      <text:h text:style-name="Heading_20_3" text:outline-level="3">Routes Added</text:h>
      <text:p text:style-name="Preformatted_20_Text"><text:span text:style-name="Source_20_Text">/login</text:span></text:p>
      <text:p text:style-name="Preformatted_20_Text"><text:span text:style-name="Source_20_Text">/admin/dashboard</text:span></text:p>
      <text:p text:style-name="Preformatted_20_Text"><text:span text:style-name="Source_20_Text">/user/dashboard</text:span></text:p>
      <text:p text:style-name="Preformatted_20_Text"><text:span text:style-name="Source_20_Text">/tasks</text:span></text:p>
      <text:p text:style-name="Preformatted_20_Text"><text:span text:style-name="Source_20_Text">/tasks/create</text:span></text:p>
      <text:p text:style-name="Preformatted_20_Text"><text:span text:style-name="Source_20_Text">/</text:span></text:p>
      <text:p text:style-name="P1"><text:span text:style-name="Source_20_Text">*</text:span></text:p>
      <text:p text:style-name="P1"><text:span text:style-name="Source_20_Text"/></text:p>
      <text:h text:style-name="Heading_20_3" text:outline-level="3"><text:soft-page-break/>Routing Behavior</text:h>
      <text:p text:style-name="Preformatted_20_Text"><text:span text:style-name="Source_20_Text">/ redirects based on login status and role.</text:span></text:p>
      <text:p text:style-name="Preformatted_20_Text"><text:span text:style-name="Source_20_Text">Invalid routes redirect back to the correct dashboard/login.</text:span></text:p>
      <text:p text:style-name="P1"><text:span text:style-name="Source_20_Text">Protected routes enforce allowed roles.</text:span></text:p>
      <text:p text:style-name="Horizontal_20_Line"/>
      <text:h text:style-name="Heading_20_1" text:outline-level="1">13. Styling Added</text:h>
      <text:p text:style-name="Text_20_body"><text:span text:style-name="T4">U</text:span>pdated:</text:p>
      <text:p text:style-name="P1"><text:span text:style-name="Source_20_Text">src/index.css</text:span></text:p>
      <text:h text:style-name="Heading_20_3" text:outline-level="3">Styling Added For</text:h>
      <text:p text:style-name="Preformatted_20_Text"><text:span text:style-name="Source_20_Text">Login page</text:span></text:p>
      <text:p text:style-name="Preformatted_20_Text"><text:span text:style-name="Source_20_Text">Dashboard cards</text:span></text:p>
      <text:p text:style-name="Preformatted_20_Text"><text:span text:style-name="Source_20_Text">Tables</text:span></text:p>
      <text:p text:style-name="Preformatted_20_Text"><text:span text:style-name="Source_20_Text">Cards</text:span></text:p>
      <text:p text:style-name="P1"><text:span text:style-name="Source_20_Text">Background layout</text:span></text:p>
      <text:p text:style-name="Text_20_body">Bootstrap was used for responsive layout and clean UI.</text:p>
      <text:p text:style-name="Horizontal_20_Line"/>
      <text:h text:style-name="Heading_20_1" text:outline-level="1">14. Frontend-Backend Integration Verified</text:h>
      <text:p text:style-name="Text_20_body"><text:span text:style-name="T4">C</text:span>onfirmed:</text:p>
      <text:p text:style-name="Preformatted_20_Text"><text:span text:style-name="Source_20_Text">Vite React app opened successfully.</text:span></text:p>
      <text:p text:style-name="Preformatted_20_Text"><text:span text:style-name="Source_20_Text">Admin login worked.</text:span></text:p>
      <text:p text:style-name="Preformatted_20_Text"><text:span text:style-name="Source_20_Text">Admin dashboard loaded.</text:span></text:p>
      <text:p text:style-name="Preformatted_20_Text"><text:span text:style-name="Source_20_Text">Task list loaded.</text:span></text:p>
      <text:p text:style-name="Preformatted_20_Text"><text:span text:style-name="Source_20_Text">Create task worked from frontend.</text:span></text:p>
      <text:p text:style-name="Preformatted_20_Text"><text:span text:style-name="Source_20_Text">User login worked.</text:span></text:p>
      <text:p text:style-name="P1"><text:span text:style-name="Source_20_Text">User can update task status.</text:span></text:p>
      <text:p text:style-name="Text_20_body">This means the frontend and backend are correctly integrated.</text:p>
      <text:p text:style-name="Horizontal_20_Line"/>
      <text:h text:style-name="Heading_20_1" text:outline-level="1">Completed Full-Stack Features So Far</text:h>
      <text:p text:style-name="Preformatted_20_Text"><text:span text:style-name="Source_20_Text">Django REST Framework backend</text:span></text:p>
      <text:p text:style-name="Preformatted_20_Text"><text:span text:style-name="Source_20_Text">PostgreSQL database</text:span></text:p>
      <text:p text:style-name="Preformatted_20_Text"><text:span text:style-name="Source_20_Text">Custom user model</text:span></text:p>
      <text:p text:style-name="Preformatted_20_Text"><text:span text:style-name="Source_20_Text">Admin/User roles</text:span></text:p>
      <text:p text:style-name="Preformatted_20_Text"><text:span text:style-name="Source_20_Text">JWT login</text:span></text:p>
      <text:p text:style-name="Preformatted_20_Text"><text:span text:style-name="Source_20_Text">Protected APIs</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status update</text:span></text:p>
      <text:p text:style-name="Preformatted_20_Text"><text:span text:style-name="Source_20_Text">Dashboard APIs</text:span></text:p>
      <text:p text:style-name="Preformatted_20_Text"><text:span text:style-name="Source_20_Text">Redis + Celery async email notification</text:span></text:p>
      <text:p text:style-name="Preformatted_20_Text"><text:span text:style-name="Source_20_Text">React frontend</text:span></text:p>
      <text:p text:style-name="Preformatted_20_Text"><text:soft-page-break/><text:span text:style-name="Source_20_Text">Frontend protected routes</text:span></text:p>
      <text:p text:style-name="Preformatted_20_Text"><text:span text:style-name="Source_20_Text">Role-based UI</text:span></text:p>
      <text:p text:style-name="Preformatted_20_Text"><text:span text:style-name="Source_20_Text">Admin dashboard</text:span></text:p>
      <text:p text:style-name="Preformatted_20_Text"><text:span text:style-name="Source_20_Text">User dashboard</text:span></text:p>
      <text:p text:style-name="Preformatted_20_Text"><text:span text:style-name="Source_20_Text">Task list UI</text:span></text:p>
      <text:p text:style-name="Preformatted_20_Text"><text:span text:style-name="Source_20_Text">Task create UI</text:span></text:p>
      <text:p text:style-name="Preformatted_20_Text"><text:span text:style-name="Source_20_Text">Frontend API integration</text:span></text:p>
      <text:p text:style-name="P1"><text:span text:style-name="Source_20_Text">Bootstrap responsive styling</text:span></text:p>
      <text:p text:style-name="Horizontal_20_Line"/>
      <text:h text:style-name="Heading_20_1" text:outline-level="1">Current Project Completion Status</text:h>
      <text:p text:style-name="Preformatted_20_Text"><text:span text:style-name="Source_20_Text">Backend setup <text:s text:c="17"/>: Completed</text:span></text:p>
      <text:p text:style-name="Preformatted_20_Text"><text:span text:style-name="Source_20_Text">Authentication APIs <text:s text:c="11"/>: Completed</text:span></text:p>
      <text:p text:style-name="Preformatted_20_Text"><text:span text:style-name="Source_20_Text">Task APIs <text:s text:c="21"/>: Completed</text:span></text:p>
      <text:p text:style-name="Preformatted_20_Text"><text:span text:style-name="Source_20_Text">Dashboard APIs <text:s text:c="16"/>: Completed</text:span></text:p>
      <text:p text:style-name="Preformatted_20_Text"><text:span text:style-name="Source_20_Text">Redis + Celery <text:s text:c="16"/>: Completed</text:span></text:p>
      <text:p text:style-name="Preformatted_20_Text"><text:span text:style-name="Source_20_Text">React frontend setup <text:s text:c="10"/>: Completed</text:span></text:p>
      <text:p text:style-name="Preformatted_20_Text"><text:span text:style-name="Source_20_Text">Frontend authentication <text:s text:c="7"/>: Completed</text:span></text:p>
      <text:p text:style-name="Preformatted_20_Text"><text:span text:style-name="Source_20_Text">Frontend dashboard pages <text:s text:c="6"/>: Completed</text:span></text:p>
      <text:p text:style-name="Preformatted_20_Text"><text:span text:style-name="Source_20_Text">Frontend task pages <text:s text:c="11"/>: Completed</text:span></text:p>
      <text:p text:style-name="Preformatted_20_Text"><text:span text:style-name="Source_20_Text">Role-based frontend routing <text:s text:c="3"/>: Completed</text:span></text:p>
      <text:p text:style-name="P1"><text:span text:style-name="Source_20_Text">Manual full-stack testing <text:s text:c="5"/>: Completed</text:span></text:p>
      <text:p text:style-name="Horizontal_20_Line"/>
      <text:h text:style-name="Heading_20_1" text:outline-level="1">Pending Sections</text:h>
      <text:p text:style-name="Preformatted_20_Text"><text:span text:style-name="Source_20_Text">Postman collection</text:span></text:p>
      <text:p text:style-name="Preformatted_20_Text"><text:span text:style-name="Source_20_Text">Backend tests using PyTest/Unittest</text:span></text:p>
      <text:p text:style-name="Preformatted_20_Text"><text:span text:style-name="Source_20_Text">Docker setup</text:span></text:p>
      <text:p text:style-name="Preformatted_20_Text"><text:span text:style-name="Source_20_Text">Gunicorn</text:span></text:p>
      <text:p text:style-name="Preformatted_20_Text"><text:span text:style-name="Source_20_Text">Nginx</text:span></text:p>
      <text:p text:style-name="Preformatted_20_Text"><text:span text:style-name="Source_20_Text">AWS EC2 deployment</text:span></text:p>
      <text:p text:style-name="Preformatted_20_Text"><text:span text:style-name="Source_20_Text">GitHub Actions CI/CD</text:span></text:p>
      <text:p text:style-name="Preformatted_20_Text"><text:span text:style-name="Source_20_Text">README documentation</text:span></text:p>
      <text:p text:style-name="P1"><text:span text:style-name="Source_20_Text">Final resume/interview explanation</text:span></text:p>
      <text:p text:style-name="Horizontal_20_Line"/>
      <text:h text:style-name="Heading_20_1" text:outline-level="1">Next Section</text:h>
      <text:p text:style-name="Text_20_body">Now mov<text:span text:style-name="T4">ing</text:span> to:</text:p>
      <text:p text:style-name="P1"><text:span text:style-name="Source_20_Text">Postman collection + backend testing</text:span></text:p>
      <text:p text:style-name="Text_20_body"><text:span text:style-name="T4">W</text:span>ill do two things:</text:p>
      <text:p text:style-name="Preformatted_20_Text"><text:span text:style-name="Source_20_Text">1. Create a clean Postman testing flow for all APIs.</text:span></text:p>
      <text:p text:style-name="P1"><text:span text:style-name="Source_20_Text">2. Add backend unit/API tests using PyTest.</text:span></text:p>
      <text:p text:style-name="Text_20_body"><text:span text:style-name="Source_20_Text"/></text:p>
      <text:p text:style-name="Text_20_body"><text:span text:style-name="Source_20_Text"/></text:p>
      <text:p text:style-name="Text_20_body"><text:span text:style-name="Source_20_Text"/></text:p>
      <text:h text:style-name="Heading_20_2" text:outline-level="2"><text:soft-page-break/>Documentation — Postman + PyTest Testing Completed</text:h>
      <text:h text:style-name="Heading_20_3" text:outline-level="3">Current Project Location</text:h>
      <text:p text:style-name="P1"><text:span text:style-name="Source_20_Text">~/Downloads/All_Gits/taskflow</text:span></text:p>
      <text:p text:style-name="Horizontal_20_Line"/>
      <text:h text:style-name="Heading_20_1" text:outline-level="1">1. Postman Collection Created</text:h>
      <text:p text:style-name="Text_20_body"><text:span text:style-name="T5">C</text:span>reated a Postman collection for manual API testing.</text:p>
      <text:h text:style-name="Heading_20_3" text:outline-level="3">Collection Name</text:h>
      <text:p text:style-name="P1"><text:span text:style-name="Source_20_Text">TaskFlow API Collection</text:span></text:p>
      <text:h text:style-name="Heading_20_3" text:outline-level="3">Environment Name</text:h>
      <text:p text:style-name="P1"><text:span text:style-name="Source_20_Text">TaskFlow Local</text:span></text:p>
      <text:h text:style-name="Heading_20_3" text:outline-level="3">Environment Variables Added</text:h>
      <text:p text:style-name="Preformatted_20_Text"><text:span text:style-name="Source_20_Text">base_url</text:span></text:p>
      <text:p text:style-name="Preformatted_20_Text"><text:span text:style-name="Source_20_Text">admin_access_token</text:span></text:p>
      <text:p text:style-name="Preformatted_20_Text"><text:span text:style-name="Source_20_Text">admin_refresh_token</text:span></text:p>
      <text:p text:style-name="Preformatted_20_Text"><text:span text:style-name="Source_20_Text">user_access_token</text:span></text:p>
      <text:p text:style-name="Preformatted_20_Text"><text:span text:style-name="Source_20_Text">user_refresh_token</text:span></text:p>
      <text:p text:style-name="P1"><text:span text:style-name="Source_20_Text">task_id</text:span></text:p>
      <text:h text:style-name="Heading_20_3" text:outline-level="3">Purpose</text:h>
      <text:p text:style-name="Text_20_body">The Postman collection allows us to test all backend APIs in a structured way without repeatedly writing curl commands.</text:p>
      <text:p text:style-name="Horizontal_20_Line"/>
      <text:h text:style-name="Heading_20_1" text:outline-level="1">2. Authentication APIs Added to Postman</text:h>
      <text:p text:style-name="Text_20_body">The following authentication APIs were added:</text:p>
      <text:p text:style-name="Preformatted_20_Text"><text:span text:style-name="Source_20_Text">POST /api/auth/login/</text:span></text:p>
      <text:p text:style-name="Preformatted_20_Text"><text:span text:style-name="Source_20_Text">GET <text:s/>/api/auth/profile/</text:span></text:p>
      <text:p text:style-name="P1"><text:span text:style-name="Source_20_Text">GET <text:s/>/api/auth/users/</text:span></text:p>
      <text:h text:style-name="Heading_20_3" text:outline-level="3">Auth Test Cases Covered</text:h>
      <text:p text:style-name="Preformatted_20_Text"><text:span text:style-name="Source_20_Text">Admin login returns access and refresh tokens</text:span></text:p>
      <text:p text:style-name="Preformatted_20_Text"><text:span text:style-name="Source_20_Text">User login returns access and refresh tokens</text:span></text:p>
      <text:p text:style-name="Preformatted_20_Text"><text:span text:style-name="Source_20_Text">Admin can view profile</text:span></text:p>
      <text:p text:style-name="Preformatted_20_Text"><text:span text:style-name="Source_20_Text">Admin can view all users</text:span></text:p>
      <text:p text:style-name="P1"><text:span text:style-name="Source_20_Text">User cannot view all users</text:span></text:p>
      <text:p text:style-name="Text_20_body">This confirms JWT authentication and role-based user access.</text:p>
      <text:p text:style-name="Horizontal_20_Line"/>
      <text:h text:style-name="Heading_20_1" text:outline-level="1"><text:soft-page-break/>3. Task APIs Added to Postman</text:h>
      <text:p text:style-name="Text_20_body">The following task APIs were added:</text:p>
      <text:p text:style-name="Preformatted_20_Text"><text:span text:style-name="Source_20_Text">GET <text:s text:c="2"/>/api/tasks/</text:span></text:p>
      <text:p text:style-name="Preformatted_20_Text"><text:span text:style-name="Source_20_Text">POST <text:s/>/api/tasks/</text:span></text:p>
      <text:p text:style-name="P1"><text:span text:style-name="Source_20_Text">PATCH /api/tasks/{{task_id}}/status/</text:span></text:p>
      <text:h text:style-name="Heading_20_3" text:outline-level="3">Task Test Cases Covered</text:h>
      <text:p text:style-name="Preformatted_20_Text"><text:span text:style-name="Source_20_Text">Admin can create task</text:span></text:p>
      <text:p text:style-name="Preformatted_20_Text"><text:span text:style-name="Source_20_Text">Admin can list all tasks</text:span></text:p>
      <text:p text:style-name="Preformatted_20_Text"><text:span text:style-name="Source_20_Text">User can list assigned tasks</text:span></text:p>
      <text:p text:style-name="Preformatted_20_Text"><text:span text:style-name="Source_20_Text">User can update assigned task status</text:span></text:p>
      <text:p text:style-name="P1"><text:span text:style-name="Source_20_Text">User cannot create task</text:span></text:p>
      <text:p text:style-name="Text_20_body">This confirms task assignment and permission logic.</text:p>
      <text:p text:style-name="Horizontal_20_Line"/>
      <text:h text:style-name="Heading_20_1" text:outline-level="1">4. Dashboard APIs Added to Postman</text:h>
      <text:p text:style-name="Text_20_body">The following dashboard APIs were added:</text:p>
      <text:p text:style-name="Preformatted_20_Text"><text:span text:style-name="Source_20_Text">GET /api/dashboard/admin/</text:span></text:p>
      <text:p text:style-name="P1"><text:span text:style-name="Source_20_Text">GET /api/dashboard/user/</text:span></text:p>
      <text:h text:style-name="Heading_20_3" text:outline-level="3">Dashboard Test Cases Covered</text:h>
      <text:p text:style-name="Preformatted_20_Text"><text:span text:style-name="Source_20_Text">Admin dashboard loads for admin</text:span></text:p>
      <text:p text:style-name="Preformatted_20_Text"><text:span text:style-name="Source_20_Text">User dashboard loads for user</text:span></text:p>
      <text:p text:style-name="P1"><text:span text:style-name="Source_20_Text">User cannot access admin dashboard</text:span></text:p>
      <text:p text:style-name="Text_20_body">This confirms dashboard-level access control.</text:p>
      <text:p text:style-name="Horizontal_20_Line"/>
      <text:h text:style-name="Heading_20_1" text:outline-level="1">5. Postman Tests Added</text:h>
      <text:p text:style-name="Text_20_body">In Postman’s <text:span text:style-name="Strong_20_Emphasis">Tests</text:span> tab, <text:span text:style-name="T5">A</text:span>dded JavaScript test scripts to validate:</text:p>
      <text:p text:style-name="Preformatted_20_Text"><text:span text:style-name="Source_20_Text">HTTP status codes</text:span></text:p>
      <text:p text:style-name="Preformatted_20_Text"><text:span text:style-name="Source_20_Text">JWT token presence</text:span></text:p>
      <text:p text:style-name="Preformatted_20_Text"><text:span text:style-name="Source_20_Text">User role values</text:span></text:p>
      <text:p text:style-name="Preformatted_20_Text"><text:span text:style-name="Source_20_Text">Task creation response</text:span></text:p>
      <text:p text:style-name="Preformatted_20_Text"><text:span text:style-name="Source_20_Text">Task status update response</text:span></text:p>
      <text:p text:style-name="Preformatted_20_Text"><text:span text:style-name="Source_20_Text">Permission denied responses</text:span></text:p>
      <text:p text:style-name="P1"><text:span text:style-name="Source_20_Text">Dashboard response fields</text:span></text:p>
      <text:h text:style-name="Heading_20_3" text:outline-level="3">Example Validations</text:h>
      <text:p text:style-name="Preformatted_20_Text"><text:span text:style-name="Source_20_Text">Status 200 for successful login</text:span></text:p>
      <text:p text:style-name="Preformatted_20_Text"><text:span text:style-name="Source_20_Text">Status 201 for task creation</text:span></text:p>
      <text:p text:style-name="Preformatted_20_Text"><text:span text:style-name="Source_20_Text">Status 403 for unauthorized access</text:span></text:p>
      <text:p text:style-name="Preformatted_20_Text"><text:span text:style-name="Source_20_Text">Access token stored automatically</text:span></text:p>
      <text:p text:style-name="P1"><text:span text:style-name="Source_20_Text">Task ID stored automatically</text:span></text:p>
      <text:p text:style-name="Text_20_body"><text:soft-page-break/>This makes the Postman collection reusable and demo-ready.</text:p>
      <text:p text:style-name="Horizontal_20_Line"/>
      <text:h text:style-name="Heading_20_1" text:outline-level="1">6. PyTest Configuration Added</text:h>
      <text:p text:style-name="Text_20_body"><text:span text:style-name="T5">C</text:span>reated:</text:p>
      <text:p text:style-name="P1"><text:span text:style-name="Source_20_Text">backend/pytest.ini</text:span></text:p>
      <text:h text:style-name="Heading_20_3" text:outline-level="3">Configuration Added</text:h>
      <text:p text:style-name="Preformatted_20_Text"><text:span text:style-name="Source_20_Text">[pytest]</text:span></text:p>
      <text:p text:style-name="Preformatted_20_Text"><text:span text:style-name="Source_20_Text">DJANGO_SETTINGS_MODULE = taskflow_backend.settings</text:span></text:p>
      <text:p text:style-name="Preformatted_20_Text"><text:span text:style-name="Source_20_Text">python_files = tests.py test_*.py *_tests.py</text:span></text:p>
      <text:p text:style-name="P1"><text:span text:style-name="Source_20_Text">addopts = -v</text:span></text:p>
      <text:h text:style-name="Heading_20_3" text:outline-level="3">Purpose</text:h>
      <text:p text:style-name="Text_20_body">This config tells PyTest:</text:p>
      <text:p text:style-name="Preformatted_20_Text"><text:span text:style-name="Source_20_Text">Which Django settings file to use</text:span></text:p>
      <text:p text:style-name="Preformatted_20_Text"><text:span text:style-name="Source_20_Text">Which files should be treated as test files</text:span></text:p>
      <text:p text:style-name="P1"><text:span text:style-name="Source_20_Text">To show verbose test output</text:span></text:p>
      <text:p text:style-name="Horizontal_20_Line"/>
      <text:h text:style-name="Heading_20_1" text:outline-level="1">7. Test Folder Created</text:h>
      <text:p text:style-name="Text_20_body"><text:span text:style-name="T5">C</text:span>reated:</text:p>
      <text:p text:style-name="P1"><text:span text:style-name="Source_20_Text">backend/tests/</text:span></text:p>
      <text:p text:style-name="Text_20_body">With:</text:p>
      <text:p text:style-name="Preformatted_20_Text"><text:span text:style-name="Source_20_Text">__init__.py</text:span></text:p>
      <text:p text:style-name="Preformatted_20_Text"><text:span text:style-name="Source_20_Text">test_auth.py</text:span></text:p>
      <text:p text:style-name="Preformatted_20_Text"><text:span text:style-name="Source_20_Text">test_tasks.py</text:span></text:p>
      <text:p text:style-name="P1"><text:span text:style-name="Source_20_Text">test_dashboard.py</text:span></text:p>
      <text:p text:style-name="Text_20_body">This keeps automated backend tests organized separately from app code.</text:p>
      <text:p text:style-name="Horizontal_20_Line"/>
      <text:p text:style-name="Text_20_body"/>
      <text:p text:style-name="Text_20_body"/>
      <text:p text:style-name="Text_20_body"/>
      <text:p text:style-name="Text_20_body"/>
      <text:p text:style-name="Text_20_body"/>
      <text:h text:style-name="Heading_20_1" text:outline-level="1"><text:soft-page-break/>8. Authentication Tests Added</text:h>
      <text:p text:style-name="Text_20_body"><text:span text:style-name="T5">C</text:span>reated:</text:p>
      <text:p text:style-name="P1"><text:span text:style-name="Source_20_Text">backend/tests/test_auth.py</text:span></text:p>
      <text:h text:style-name="Heading_20_3" text:outline-level="3">Tests Covered</text:h>
      <text:p text:style-name="Preformatted_20_Text"><text:span text:style-name="Source_20_Text">Admin login returns tokens</text:span></text:p>
      <text:p text:style-name="Preformatted_20_Text"><text:span text:style-name="Source_20_Text">User login returns tokens</text:span></text:p>
      <text:p text:style-name="Preformatted_20_Text"><text:span text:style-name="Source_20_Text">Profile API requires authentication</text:span></text:p>
      <text:p text:style-name="Preformatted_20_Text"><text:span text:style-name="Source_20_Text">Authenticated user can view profile</text:span></text:p>
      <text:p text:style-name="Preformatted_20_Text"><text:span text:style-name="Source_20_Text">Admin can view users</text:span></text:p>
      <text:p text:style-name="P1"><text:span text:style-name="Source_20_Text">User cannot view users</text:span></text:p>
      <text:h text:style-name="Heading_20_3" text:outline-level="3">Purpose</text:h>
      <text:p text:style-name="Text_20_body">These tests verify:</text:p>
      <text:p text:style-name="Preformatted_20_Text"><text:span text:style-name="Source_20_Text">JWT login works</text:span></text:p>
      <text:p text:style-name="Preformatted_20_Text"><text:span text:style-name="Source_20_Text">User roles are returned correctly</text:span></text:p>
      <text:p text:style-name="Preformatted_20_Text"><text:span text:style-name="Source_20_Text">Protected APIs reject unauthenticated requests</text:span></text:p>
      <text:p text:style-name="P1"><text:span text:style-name="Source_20_Text">Admin-only user listing is protected</text:span></text:p>
      <text:p text:style-name="Horizontal_20_Line"/>
      <text:h text:style-name="Heading_20_1" text:outline-level="1">9. Task API Tests Added</text:h>
      <text:p text:style-name="Text_20_body"><text:span text:style-name="T5">C</text:span>reated:</text:p>
      <text:p text:style-name="P1"><text:span text:style-name="Source_20_Text">backend/tests/test_tasks.py</text:span></text:p>
      <text:h text:style-name="Heading_20_3" text:outline-level="3">Tests Covered</text:h>
      <text:p text:style-name="Preformatted_20_Text"><text:span text:style-name="Source_20_Text">Admin can create task</text:span></text:p>
      <text:p text:style-name="Preformatted_20_Text"><text:span text:style-name="Source_20_Text">User cannot create task</text:span></text:p>
      <text:p text:style-name="Preformatted_20_Text"><text:span text:style-name="Source_20_Text">Admin can view all tasks</text:span></text:p>
      <text:p text:style-name="Preformatted_20_Text"><text:span text:style-name="Source_20_Text">User can view only assigned tasks</text:span></text:p>
      <text:p text:style-name="Preformatted_20_Text"><text:span text:style-name="Source_20_Text">User can update assigned task status</text:span></text:p>
      <text:p text:style-name="Preformatted_20_Text"><text:span text:style-name="Source_20_Text">User cannot update unassigned task status</text:span></text:p>
      <text:p text:style-name="Preformatted_20_Text"><text:span text:style-name="Source_20_Text">User cannot delete task</text:span></text:p>
      <text:p text:style-name="P1"><text:span text:style-name="Source_20_Text">Admin can delete task</text:span></text:p>
      <text:h text:style-name="Heading_20_3" text:outline-level="3">Important Testing Detail</text:h>
      <text:p text:style-name="Text_20_body">Celery email sending was mocked using:</text:p>
      <text:p text:style-name="P1"><text:span text:style-name="Source_20_Text">@patch("tasks.views.send_task_assignment_email.delay")</text:span></text:p>
      <text:h text:style-name="Heading_20_3" text:outline-level="3">Why This Matters</text:h>
      <text:p text:style-name="Text_20_body">The test verifies that task creation triggers the async email function, but it does not require Redis or Celery worker to run during tests. That makes the test suite stable and fast.</text:p>
      <text:p text:style-name="Horizontal_20_Line"/>
      <text:h text:style-name="Heading_20_1" text:outline-level="1"><text:soft-page-break/>10. Dashboard Tests Added</text:h>
      <text:p text:style-name="Text_20_body"><text:span text:style-name="T5">C</text:span>reated:</text:p>
      <text:p text:style-name="P1"><text:span text:style-name="Source_20_Text">backend/tests/test_dashboard.py</text:span></text:p>
      <text:h text:style-name="Heading_20_3" text:outline-level="3">Tests Covered</text:h>
      <text:p text:style-name="Preformatted_20_Text"><text:span text:style-name="Source_20_Text">Admin dashboard accessible by admin</text:span></text:p>
      <text:p text:style-name="Preformatted_20_Text"><text:span text:style-name="Source_20_Text">Admin dashboard blocked for user</text:span></text:p>
      <text:p text:style-name="P1"><text:span text:style-name="Source_20_Text">User dashboard accessible by user</text:span></text:p>
      <text:h text:style-name="Heading_20_3" text:outline-level="3">Purpose</text:h>
      <text:p text:style-name="Text_20_body">These tests confirm that dashboard APIs return correct statistics and enforce role-based access.</text:p>
      <text:p text:style-name="Horizontal_20_Line"/>
      <text:h text:style-name="Heading_20_1" text:outline-level="1">11. Test Database Permission Confirmed</text:h>
      <text:p text:style-name="Text_20_body">PyTest successfully ran all tests.</text:p>
      <text:p text:style-name="Text_20_body">This confirms PostgreSQL test database creation worked correctly.</text:p>
      <text:p text:style-name="Text_20_body">No database permission issue occurred.</text:p>
      <text:p text:style-name="Horizontal_20_Line"/>
      <text:h text:style-name="Heading_20_1" text:outline-level="1">12. Automated Test Run Completed</text:h>
      <text:p text:style-name="Text_20_body"><text:span text:style-name="T5">R</text:span>an:</text:p>
      <text:p text:style-name="P1"><text:span text:style-name="Source_20_Text">pytest</text:span></text:p>
      <text:h text:style-name="Heading_20_3" text:outline-level="3">Result</text:h>
      <text:p text:style-name="P1"><text:span text:style-name="Source_20_Text">17 passed</text:span></text:p>
      <text:h text:style-name="Heading_20_3" text:outline-level="3">Status</text:h>
      <text:p text:style-name="Preformatted_20_Text"><text:span text:style-name="Source_20_Text">All backend tests passed successfully.</text:span></text:p>
      <text:p text:style-name="P1"><text:span text:style-name="Source_20_Text">No failed test errors.</text:span></text:p>
      <text:p text:style-name="Horizontal_20_Line"/>
      <text:p text:style-name="Text_20_body"/>
      <text:p text:style-name="Text_20_body"/>
      <text:h text:style-name="Heading_20_1" text:outline-level="1"><text:soft-page-break/>13. Testing Coverage Summary</text:h>
      <text:h text:style-name="Heading_20_2" text:outline-level="2">Total Tests</text:h>
      <text:p text:style-name="P1"><text:span text:style-name="Source_20_Text">17 tests passed</text:span></text:p>
      <text:h text:style-name="Heading_20_2" text:outline-level="2">Test Areas</text:h>
      <text:p text:style-name="Preformatted_20_Text"><text:span text:style-name="Source_20_Text">Authentication</text:span></text:p>
      <text:p text:style-name="Preformatted_20_Text"><text:span text:style-name="Source_20_Text">JWT login</text:span></text:p>
      <text:p text:style-name="Preformatted_20_Text"><text:span text:style-name="Source_20_Text">Role-based user permissions</text:span></text:p>
      <text:p text:style-name="Preformatted_20_Text"><text:span text:style-name="Source_20_Text">Task creation</text:span></text:p>
      <text:p text:style-name="Preformatted_20_Text"><text:span text:style-name="Source_20_Text">Task visibility</text:span></text:p>
      <text:p text:style-name="Preformatted_20_Text"><text:span text:style-name="Source_20_Text">Task status update</text:span></text:p>
      <text:p text:style-name="Preformatted_20_Text"><text:span text:style-name="Source_20_Text">Task delete permissions</text:span></text:p>
      <text:p text:style-name="Preformatted_20_Text"><text:span text:style-name="Source_20_Text">Dashboard permissions</text:span></text:p>
      <text:p text:style-name="Preformatted_20_Text"><text:span text:style-name="Source_20_Text">Dashboard statistics</text:span></text:p>
      <text:p text:style-name="P1"><text:span text:style-name="Source_20_Text">Celery trigger mocking</text:span></text:p>
      <text:p text:style-name="Horizontal_20_Line"/>
      <text:h text:style-name="Heading_20_1" text:outline-level="1">Current Completed Project Features</text:h>
      <text:p text:style-name="Preformatted_20_Text"><text:span text:style-name="Source_20_Text">Django REST Framework backend</text:span></text:p>
      <text:p text:style-name="Preformatted_20_Text"><text:span text:style-name="Source_20_Text">PostgreSQL database</text:span></text:p>
      <text:p text:style-name="Preformatted_20_Text"><text:span text:style-name="Source_20_Text">Custom user model</text:span></text:p>
      <text:p text:style-name="Preformatted_20_Text"><text:span text:style-name="Source_20_Text">Admin/User roles</text:span></text:p>
      <text:p text:style-name="Preformatted_20_Text"><text:span text:style-name="Source_20_Text">JWT authentication</text:span></text:p>
      <text:p text:style-name="Preformatted_20_Text"><text:span text:style-name="Source_20_Text">User management APIs</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filtering</text:span></text:p>
      <text:p text:style-name="Preformatted_20_Text"><text:span text:style-name="Source_20_Text">Task status update</text:span></text:p>
      <text:p text:style-name="Preformatted_20_Text"><text:span text:style-name="Source_20_Text">Dashboard APIs</text:span></text:p>
      <text:p text:style-name="Preformatted_20_Text"><text:span text:style-name="Source_20_Text">Redis + Celery async email notification</text:span></text:p>
      <text:p text:style-name="Preformatted_20_Text"><text:span text:style-name="Source_20_Text">React frontend</text:span></text:p>
      <text:p text:style-name="Preformatted_20_Text"><text:span text:style-name="Source_20_Text">Frontend authentication</text:span></text:p>
      <text:p text:style-name="Preformatted_20_Text"><text:span text:style-name="Source_20_Text">Frontend protected routes</text:span></text:p>
      <text:p text:style-name="Preformatted_20_Text"><text:span text:style-name="Source_20_Text">Admin dashboard UI</text:span></text:p>
      <text:p text:style-name="Preformatted_20_Text"><text:span text:style-name="Source_20_Text">User dashboard UI</text:span></text:p>
      <text:p text:style-name="Preformatted_20_Text"><text:span text:style-name="Source_20_Text">Task list UI</text:span></text:p>
      <text:p text:style-name="Preformatted_20_Text"><text:span text:style-name="Source_20_Text">Task create UI</text:span></text:p>
      <text:p text:style-name="Preformatted_20_Text"><text:span text:style-name="Source_20_Text">Postman API collection</text:span></text:p>
      <text:p text:style-name="P1"><text:span text:style-name="Source_20_Text">Automated PyTest backend tests</text:span></text:p>
      <text:p text:style-name="Horizontal_20_Line"/>
      <text:p text:style-name="Text_20_body"/>
      <text:p text:style-name="Text_20_body"/>
      <text:p text:style-name="Text_20_body"/>
      <text:p text:style-name="Text_20_body"/>
      <text:h text:style-name="Heading_20_1" text:outline-level="1"><text:soft-page-break/>Current Completion Status</text:h>
      <text:p text:style-name="Preformatted_20_Text"><text:span text:style-name="Source_20_Text">Backend APIs <text:s text:c="16"/>: Completed</text:span></text:p>
      <text:p text:style-name="Preformatted_20_Text"><text:span text:style-name="Source_20_Text">Frontend UI <text:s text:c="17"/>: Completed</text:span></text:p>
      <text:p text:style-name="Preformatted_20_Text"><text:span text:style-name="Source_20_Text">Redis + Celery <text:s text:c="14"/>: Completed</text:span></text:p>
      <text:p text:style-name="Preformatted_20_Text"><text:span text:style-name="Source_20_Text">Manual API testing <text:s text:c="10"/>: Completed</text:span></text:p>
      <text:p text:style-name="Preformatted_20_Text"><text:span text:style-name="Source_20_Text">Postman testing <text:s text:c="13"/>: Completed</text:span></text:p>
      <text:p text:style-name="P1"><text:span text:style-name="Source_20_Text">Automated backend testing <text:s text:c="3"/>: Completed</text:span></text:p>
      <text:p text:style-name="Horizontal_20_Line"/>
      <text:h text:style-name="Heading_20_1" text:outline-level="1">Pending Major Sections</text:h>
      <text:p text:style-name="Preformatted_20_Text"><text:span text:style-name="Source_20_Text">Docker setup</text:span></text:p>
      <text:p text:style-name="Preformatted_20_Text"><text:span text:style-name="Source_20_Text">Gunicorn</text:span></text:p>
      <text:p text:style-name="Preformatted_20_Text"><text:span text:style-name="Source_20_Text">Nginx</text:span></text:p>
      <text:p text:style-name="Preformatted_20_Text"><text:span text:style-name="Source_20_Text">AWS EC2 deployment</text:span></text:p>
      <text:p text:style-name="Preformatted_20_Text"><text:span text:style-name="Source_20_Text">GitHub Actions CI/CD</text:span></text:p>
      <text:p text:style-name="Preformatted_20_Text"><text:span text:style-name="Source_20_Text">README documentation</text:span></text:p>
      <text:p text:style-name="P1"><text:span text:style-name="Source_20_Text">Final interview explanation</text:span></text:p>
      <text:p text:style-name="Horizontal_20_Line"/>
      <text:h text:style-name="Heading_20_1" text:outline-level="1">Next Section</text:h>
      <text:p text:style-name="Text_20_body">Now mov<text:span text:style-name="T5">ing</text:span> to:</text:p>
      <text:p text:style-name="P1"><text:span text:style-name="Source_20_Text">Docker setup</text:span></text:p>
      <text:p text:style-name="Text_20_body">We will create:</text:p>
      <text:p text:style-name="Preformatted_20_Text"><text:span text:style-name="Source_20_Text">Backend Dockerfile</text:span></text:p>
      <text:p text:style-name="Preformatted_20_Text"><text:span text:style-name="Source_20_Text">Frontend Dockerfile</text:span></text:p>
      <text:p text:style-name="Preformatted_20_Text"><text:span text:style-name="Source_20_Text">docker-compose.yml</text:span></text:p>
      <text:p text:style-name="Preformatted_20_Text"><text:span text:style-name="Source_20_Text">PostgreSQL service</text:span></text:p>
      <text:p text:style-name="Preformatted_20_Text"><text:span text:style-name="Source_20_Text">Redis service</text:span></text:p>
      <text:p text:style-name="Preformatted_20_Text"><text:span text:style-name="Source_20_Text">Celery worker service</text:span></text:p>
      <text:p text:style-name="Preformatted_20_Text"><text:span text:style-name="Source_20_Text">Nginx reverse proxy preparation</text:span></text:p>
      <text:p text:style-name="P1"><text:span text:style-name="Source_20_Text">Environment handling for Docker</text:span></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h text:style-name="Heading_20_2" text:outline-level="2"><text:soft-page-break/>Documentation — Docker Setup Completed</text:h>
      <text:h text:style-name="Heading_20_3" text:outline-level="3">Project Root</text:h>
      <text:p text:style-name="P1"><text:span text:style-name="Source_20_Text">~/Downloads/All_Gits/taskflow</text:span></text:p>
      <text:p text:style-name="Horizontal_20_Line"/>
      <text:h text:style-name="Heading_20_1" text:outline-level="1">1. Docker Build Completed</text:h>
      <text:p text:style-name="Text_20_body"><text:span text:style-name="T6">S</text:span>uccessfully built all required Docker images:</text:p>
      <text:p text:style-name="Preformatted_20_Text"><text:span text:style-name="Source_20_Text">taskflow-backend</text:span></text:p>
      <text:p text:style-name="Preformatted_20_Text"><text:span text:style-name="Source_20_Text">taskflow-celery</text:span></text:p>
      <text:p text:style-name="P1"><text:span text:style-name="Source_20_Text">taskflow-frontend</text:span></text:p>
      <text:p text:style-name="Text_20_body">Build result:</text:p>
      <text:p text:style-name="Preformatted_20_Text"><text:span text:style-name="Source_20_Text">All images built successfully.</text:span></text:p>
      <text:p text:style-name="P1"><text:span text:style-name="Source_20_Text">No Docker build errors.</text:span></text:p>
      <text:p text:style-name="Horizontal_20_Line"/>
      <text:h text:style-name="Heading_20_1" text:outline-level="1">2. Docker Compose Services Created</text:h>
      <text:p text:style-name="Text_20_body"><text:span text:style-name="T6">C</text:span>reated and ran these services using:</text:p>
      <text:p text:style-name="P1"><text:span text:style-name="Source_20_Text">docker-compose.yml</text:span></text:p>
      <text:h text:style-name="Heading_20_3" text:outline-level="3">Services</text:h>
      <text:p text:style-name="Preformatted_20_Text"><text:span text:style-name="Source_20_Text">db <text:s text:c="7"/>: PostgreSQL 16 database</text:span></text:p>
      <text:p text:style-name="Preformatted_20_Text"><text:span text:style-name="Source_20_Text">redis <text:s text:c="4"/>: Redis message broker</text:span></text:p>
      <text:p text:style-name="Preformatted_20_Text"><text:span text:style-name="Source_20_Text">backend <text:s text:c="2"/>: Django REST Framework + Gunicorn</text:span></text:p>
      <text:p text:style-name="Preformatted_20_Text"><text:span text:style-name="Source_20_Text">celery <text:s text:c="3"/>: Celery worker</text:span></text:p>
      <text:p text:style-name="P1"><text:span text:style-name="Source_20_Text">frontend <text:s/>: React production build served by Nginx</text:span></text:p>
      <text:p text:style-name="Horizontal_20_Line"/>
      <text:h text:style-name="Heading_20_1" text:outline-level="1">3. Docker Containers Running Successfully</text:h>
      <text:p text:style-name="Text_20_body">You verified with:</text:p>
      <text:p text:style-name="P1"><text:span text:style-name="Source_20_Text">docker compose ps</text:span></text:p>
      <text:h text:style-name="Heading_20_3" text:outline-level="3">Running Containers</text:h>
      <text:p text:style-name="Preformatted_20_Text"><text:span text:style-name="Source_20_Text">taskflow_backend</text:span></text:p>
      <text:p text:style-name="Preformatted_20_Text"><text:span text:style-name="Source_20_Text">taskflow_celery</text:span></text:p>
      <text:p text:style-name="Preformatted_20_Text"><text:span text:style-name="Source_20_Text">taskflow_db</text:span></text:p>
      <text:p text:style-name="Preformatted_20_Text"><text:span text:style-name="Source_20_Text">taskflow_frontend</text:span></text:p>
      <text:p text:style-name="P1"><text:span text:style-name="Source_20_Text">taskflow_redis</text:span></text:p>
      <text:h text:style-name="Heading_20_3" text:outline-level="3"><text:soft-page-break/>Port Mapping</text:h>
      <text:p text:style-name="Preformatted_20_Text"><text:span text:style-name="Source_20_Text">Backend <text:s text:c="3"/>: 8000 → 8000</text:span></text:p>
      <text:p text:style-name="Preformatted_20_Text"><text:span text:style-name="Source_20_Text">Frontend <text:s text:c="2"/>: 3000 → 80</text:span></text:p>
      <text:p text:style-name="Preformatted_20_Text"><text:span text:style-name="Source_20_Text">PostgreSQL : 5433 → 5432</text:span></text:p>
      <text:p text:style-name="P1"><text:span text:style-name="Source_20_Text">Redis <text:s text:c="5"/>: 6380 → 6379</text:span></text:p>
      <text:p text:style-name="Text_20_body">Important note:</text:p>
      <text:p text:style-name="Preformatted_20_Text"><text:span text:style-name="Source_20_Text">Docker PostgreSQL uses host port 5433 to avoid conflict with local PostgreSQL on 5432. Inside Docker, Django connects to db:5432.</text:span></text:p>
      <text:p text:style-name="Horizontal_20_Line"/>
      <text:h text:style-name="Heading_20_1" text:outline-level="1">4. Backend Dockerfile Created</text:h>
      <text:p text:style-name="Text_20_body"><text:span text:style-name="T6">C</text:span>reated:</text:p>
      <text:p text:style-name="P1"><text:span text:style-name="Source_20_Text">backend/Dockerfile</text:span></text:p>
      <text:h text:style-name="Heading_20_3" text:outline-level="3">Purpose</text:h>
      <text:p text:style-name="Text_20_body">The backend Dockerfile:</text:p>
      <text:p text:style-name="Preformatted_20_Text"><text:span text:style-name="Source_20_Text">Uses Python 3.12 slim image</text:span></text:p>
      <text:p text:style-name="Preformatted_20_Text"><text:span text:style-name="Source_20_Text">Installs system dependencies</text:span></text:p>
      <text:p text:style-name="Preformatted_20_Text"><text:span text:style-name="Source_20_Text">Installs Python requirements</text:span></text:p>
      <text:p text:style-name="Preformatted_20_Text"><text:span text:style-name="Source_20_Text">Copies Django backend code</text:span></text:p>
      <text:p text:style-name="P1"><text:span text:style-name="Source_20_Text">Runs Gunicorn on port 8000</text:span></text:p>
      <text:h text:style-name="Heading_20_3" text:outline-level="3">Production Server Used</text:h>
      <text:p text:style-name="P1"><text:span text:style-name="Source_20_Text">Gunicorn</text:span></text:p>
      <text:p text:style-name="Horizontal_20_Line"/>
      <text:h text:style-name="Heading_20_1" text:outline-level="1">5. Backend <text:span text:style-name="Source_20_Text">.dockerignore</text:span> Created</text:h>
      <text:p text:style-name="Text_20_body"><text:span text:style-name="T6">C</text:span>reated:</text:p>
      <text:p text:style-name="P1"><text:span text:style-name="Source_20_Text">backend/.dockerignore</text:span></text:p>
      <text:h text:style-name="Heading_20_3" text:outline-level="3">Excluded From Docker Build</text:h>
      <text:p text:style-name="Preformatted_20_Text"><text:span text:style-name="Source_20_Text">venv</text:span></text:p>
      <text:p text:style-name="Preformatted_20_Text"><text:span text:style-name="Source_20_Text">__pycache__</text:span></text:p>
      <text:p text:style-name="Preformatted_20_Text"><text:span text:style-name="Source_20_Text">.env</text:span></text:p>
      <text:p text:style-name="Preformatted_20_Text"><text:span text:style-name="Source_20_Text">db.sqlite3</text:span></text:p>
      <text:p text:style-name="Preformatted_20_Text"><text:span text:style-name="Source_20_Text">.pytest_cache</text:span></text:p>
      <text:p text:style-name="Preformatted_20_Text"><text:span text:style-name="Source_20_Text">staticfiles</text:span></text:p>
      <text:p text:style-name="P1"><text:span text:style-name="Source_20_Text">coverage files</text:span></text:p>
      <text:h text:style-name="Heading_20_3" text:outline-level="3">Purpose</text:h>
      <text:p text:style-name="Text_20_body">This keeps the Docker image clean and avoids copying unnecessary local files.</text:p>
      <text:p text:style-name="Horizontal_20_Line"/>
      <text:h text:style-name="Heading_20_1" text:outline-level="1"><text:soft-page-break/>6. Docker Environment File Created</text:h>
      <text:p text:style-name="Text_20_body"><text:span text:style-name="T6">C</text:span>reated:</text:p>
      <text:p text:style-name="P1"><text:span text:style-name="Source_20_Text">backend/.env.docker</text:span></text:p>
      <text:h text:style-name="Heading_20_3" text:outline-level="3">Docker Environment Contains</text:h>
      <text:p text:style-name="Preformatted_20_Text"><text:span text:style-name="Source_20_Text">SECRET_KEY</text:span></text:p>
      <text:p text:style-name="Preformatted_20_Text"><text:span text:style-name="Source_20_Text">DEBUG=False</text:span></text:p>
      <text:p text:style-name="Preformatted_20_Text"><text:span text:style-name="Source_20_Text">DB_NAME</text:span></text:p>
      <text:p text:style-name="Preformatted_20_Text"><text:span text:style-name="Source_20_Text">DB_USER</text:span></text:p>
      <text:p text:style-name="Preformatted_20_Text"><text:span text:style-name="Source_20_Text">DB_PASSWORD</text:span></text:p>
      <text:p text:style-name="Preformatted_20_Text"><text:span text:style-name="Source_20_Text">DB_HOST=db</text:span></text:p>
      <text:p text:style-name="Preformatted_20_Text"><text:span text:style-name="Source_20_Text">DB_PORT=5432</text:span></text:p>
      <text:p text:style-name="Preformatted_20_Text"><text:span text:style-name="Source_20_Text">CELERY_BROKER_URL=redis://redis:6379/0</text:span></text:p>
      <text:p text:style-name="Preformatted_20_Text"><text:span text:style-name="Source_20_Text">CELERY_RESULT_BACKEND=redis://redis:6379/0</text:span></text:p>
      <text:p text:style-name="Preformatted_20_Text"><text:span text:style-name="Source_20_Text">EMAIL_BACKEND</text:span></text:p>
      <text:p text:style-name="P1"><text:span text:style-name="Source_20_Text">DEFAULT_FROM_EMAIL</text:span></text:p>
      <text:h text:style-name="Heading_20_3" text:outline-level="3">Important Difference From Local <text:span text:style-name="Source_20_Text">.env</text:span></text:h>
      <text:p text:style-name="Text_20_body">Local backend uses:</text:p>
      <text:p text:style-name="Preformatted_20_Text"><text:span text:style-name="Source_20_Text">DB_HOST=localhost</text:span></text:p>
      <text:p text:style-name="P1"><text:span text:style-name="Source_20_Text">Redis host=localhost</text:span></text:p>
      <text:p text:style-name="Text_20_body">Docker backend uses:</text:p>
      <text:p text:style-name="Preformatted_20_Text"><text:span text:style-name="Source_20_Text">DB_HOST=db</text:span></text:p>
      <text:p text:style-name="P1"><text:span text:style-name="Source_20_Text">Redis host=redis</text:span></text:p>
      <text:p text:style-name="Text_20_body">Because Docker services communicate through service names.</text:p>
      <text:p text:style-name="Horizontal_20_Line"/>
      <text:h text:style-name="Heading_20_1" text:outline-level="1">7. Backend Settings Updated for Docker</text:h>
      <text:p text:style-name="Text_20_body"><text:span text:style-name="T6">U</text:span>pdated:</text:p>
      <text:p text:style-name="P1"><text:span text:style-name="Source_20_Text">backend/taskflow_backend/settings.py</text:span></text:p>
      <text:h text:style-name="Heading_20_3" text:outline-level="3">Updated</text:h>
      <text:p text:style-name="Preformatted_20_Text"><text:span text:style-name="Source_20_Text">ALLOWED_HOSTS</text:span></text:p>
      <text:p text:style-name="Preformatted_20_Text"><text:span text:style-name="Source_20_Text">CORS_ALLOWED_ORIGINS</text:span></text:p>
      <text:p text:style-name="P1"><text:span text:style-name="Source_20_Text">CSRF_TRUSTED_ORIGINS</text:span></text:p>
      <text:h text:style-name="Heading_20_3" text:outline-level="3">Added Local Docker Origins</text:h>
      <text:p text:style-name="Preformatted_20_Text"><text:span text:style-name="Source_20_Text">http://localhost</text:span></text:p>
      <text:p text:style-name="P1"><text:span text:style-name="Source_20_Text">http://127.0.0.1</text:span></text:p>
      <text:p text:style-name="Text_20_body">This allows the Docker frontend to call the Docker backend.</text:p>
      <text:p text:style-name="Horizontal_20_Line"/>
      <text:h text:style-name="Heading_20_1" text:outline-level="1"><text:soft-page-break/>8. Frontend Dockerfile Created</text:h>
      <text:p text:style-name="Text_20_body"><text:span text:style-name="T6">C</text:span>reated:</text:p>
      <text:p text:style-name="P1"><text:span text:style-name="Source_20_Text">frontend/Dockerfile</text:span></text:p>
      <text:h text:style-name="Heading_20_3" text:outline-level="3">Build Flow</text:h>
      <text:p text:style-name="Preformatted_20_Text"><text:span text:style-name="Source_20_Text">Stage 1: Build React app using Node 22 Alpine</text:span></text:p>
      <text:p text:style-name="P1"><text:span text:style-name="Source_20_Text">Stage 2: Serve built files using Nginx Alpine</text:span></text:p>
      <text:h text:style-name="Heading_20_3" text:outline-level="3">Purpose</text:h>
      <text:p text:style-name="Text_20_body">This gives us a production-style frontend container.</text:p>
      <text:p text:style-name="Horizontal_20_Line"/>
      <text:h text:style-name="Heading_20_1" text:outline-level="1">9. Frontend Nginx Config Created</text:h>
      <text:p text:style-name="Text_20_body"><text:span text:style-name="T6">C</text:span>reated:</text:p>
      <text:p text:style-name="P1"><text:span text:style-name="Source_20_Text">frontend/nginx.conf</text:span></text:p>
      <text:h text:style-name="Heading_20_3" text:outline-level="3">Purpose</text:h>
      <text:p text:style-name="Text_20_body">The config serves the React build and supports React Router using:</text:p>
      <text:p text:style-name="P1"><text:span text:style-name="Source_20_Text">try_files $uri /index.html;</text:span></text:p>
      <text:p text:style-name="Text_20_body">This prevents page refresh issues on routes like:</text:p>
      <text:p text:style-name="Preformatted_20_Text"><text:span text:style-name="Source_20_Text">/admin/dashboard</text:span></text:p>
      <text:p text:style-name="Preformatted_20_Text"><text:span text:style-name="Source_20_Text">/tasks</text:span></text:p>
      <text:p text:style-name="P1"><text:span text:style-name="Source_20_Text">/tasks/create</text:span></text:p>
      <text:p text:style-name="Horizontal_20_Line"/>
      <text:h text:style-name="Heading_20_1" text:outline-level="1">10. Frontend <text:span text:style-name="Source_20_Text">.dockerignore</text:span> Created</text:h>
      <text:p text:style-name="Text_20_body"><text:span text:style-name="T6">C</text:span>reated:</text:p>
      <text:p text:style-name="P1"><text:span text:style-name="Source_20_Text">frontend/.dockerignore</text:span></text:p>
      <text:h text:style-name="Heading_20_3" text:outline-level="3">Excluded</text:h>
      <text:p text:style-name="Preformatted_20_Text"><text:span text:style-name="Source_20_Text">node_modules</text:span></text:p>
      <text:p text:style-name="Preformatted_20_Text"><text:span text:style-name="Source_20_Text">dist</text:span></text:p>
      <text:p text:style-name="Preformatted_20_Text"><text:span text:style-name="Source_20_Text">.env</text:span></text:p>
      <text:p text:style-name="Preformatted_20_Text"><text:span text:style-name="Source_20_Text">.git</text:span></text:p>
      <text:p text:style-name="P1"><text:span text:style-name="Source_20_Text">npm-debug.log</text:span></text:p>
      <text:p text:style-name="Text_20_body">This keeps the frontend Docker build clean.</text:p>
      <text:p text:style-name="Horizontal_20_Line"/>
      <text:h text:style-name="Heading_20_1" text:outline-level="1"><text:soft-page-break/>11. Docker Compose File Created</text:h>
      <text:p text:style-name="Text_20_body"><text:span text:style-name="T6">C</text:span>reated:</text:p>
      <text:p text:style-name="P1"><text:span text:style-name="Source_20_Text">docker-compose.yml</text:span></text:p>
      <text:h text:style-name="Heading_20_3" text:outline-level="3">Responsibilities</text:h>
      <text:p text:style-name="Preformatted_20_Text"><text:span text:style-name="Source_20_Text">Starts PostgreSQL</text:span></text:p>
      <text:p text:style-name="Preformatted_20_Text"><text:span text:style-name="Source_20_Text">Starts Redis</text:span></text:p>
      <text:p text:style-name="Preformatted_20_Text"><text:span text:style-name="Source_20_Text">Builds and runs Django backend</text:span></text:p>
      <text:p text:style-name="Preformatted_20_Text"><text:span text:style-name="Source_20_Text">Runs database migrations</text:span></text:p>
      <text:p text:style-name="Preformatted_20_Text"><text:span text:style-name="Source_20_Text">Runs collectstatic</text:span></text:p>
      <text:p text:style-name="Preformatted_20_Text"><text:span text:style-name="Source_20_Text">Starts Gunicorn</text:span></text:p>
      <text:p text:style-name="Preformatted_20_Text"><text:span text:style-name="Source_20_Text">Starts Celery worker</text:span></text:p>
      <text:p text:style-name="Preformatted_20_Text"><text:span text:style-name="Source_20_Text">Builds and serves React frontend</text:span></text:p>
      <text:p text:style-name="Preformatted_20_Text"><text:span text:style-name="Source_20_Text">Creates persistent PostgreSQL volume</text:span></text:p>
      <text:p text:style-name="P1"><text:span text:style-name="Source_20_Text">Creates static files volume</text:span></text:p>
      <text:p text:style-name="Horizontal_20_Line"/>
      <text:h text:style-name="Heading_20_1" text:outline-level="1">12. Docker Backend Verified</text:h>
      <text:p text:style-name="Text_20_body"><text:span text:style-name="T6">C</text:span>onfirmed:</text:p>
      <text:p text:style-name="P1"><text:span text:style-name="Source_20_Text">Docker backend login worked.</text:span></text:p>
      <text:p text:style-name="Text_20_body">Tested through:</text:p>
      <text:p text:style-name="P1"><text:span text:style-name="Source_20_Text">http://127.0.0.1:8000/api/auth/login/</text:span></text:p>
      <text:p text:style-name="Text_20_body">This confirms:</text:p>
      <text:p text:style-name="Preformatted_20_Text"><text:span text:style-name="Source_20_Text">Backend container works</text:span></text:p>
      <text:p text:style-name="Preformatted_20_Text"><text:span text:style-name="Source_20_Text">Gunicorn works</text:span></text:p>
      <text:p text:style-name="Preformatted_20_Text"><text:span text:style-name="Source_20_Text">Docker PostgreSQL connection works</text:span></text:p>
      <text:p text:style-name="Preformatted_20_Text"><text:span text:style-name="Source_20_Text">JWT login works inside Docker</text:span></text:p>
      <text:p text:style-name="P1"><text:span text:style-name="Source_20_Text">Migrations ran successfully</text:span></text:p>
      <text:p text:style-name="Horizontal_20_Line"/>
      <text:h text:style-name="Heading_20_1" text:outline-level="1">13. Docker Frontend Verified</text:h>
      <text:p text:style-name="Text_20_body"><text:span text:style-name="T6">O</text:span>pened: <text:span text:style-name="Source_20_Text">http://127.0.0.1:3000/</text:span></text:p>
      <text:h text:style-name="P3" text:outline-level="3">Result <text:span text:style-name="Source_20_Text"><text:span text:style-name="T9">Docker frontend opened successfully.</text:span></text:span></text:h>
      <text:p text:style-name="Text_20_body">This confirms:</text:p>
      <text:p text:style-name="Preformatted_20_Text"><text:span text:style-name="Source_20_Text">React build succeeded</text:span></text:p>
      <text:p text:style-name="Preformatted_20_Text"><text:span text:style-name="Source_20_Text">Nginx served frontend correctly</text:span></text:p>
      <text:p text:style-name="Preformatted_20_Text"><text:span text:style-name="Source_20_Text">Frontend container works</text:span></text:p>
      <text:p text:style-name="P1"><text:span text:style-name="Source_20_Text">Frontend can be accessed from browser</text:span></text:p>
      <text:p text:style-name="Horizontal_20_Line"/>
      <text:h text:style-name="Heading_20_1" text:outline-level="1"><text:soft-page-break/>14. Docker Celery Verified</text:h>
      <text:p text:style-name="Text_20_body">Initial Celery logs confirmed:</text:p>
      <text:p text:style-name="Preformatted_20_Text"><text:span text:style-name="Source_20_Text">Celery worker started</text:span></text:p>
      <text:p text:style-name="Preformatted_20_Text"><text:span text:style-name="Source_20_Text">Connected to Redis</text:span></text:p>
      <text:p text:style-name="Preformatted_20_Text"><text:span text:style-name="Source_20_Text">Registered task found</text:span></text:p>
      <text:p text:style-name="P1"><text:span text:style-name="Source_20_Text">Worker ready</text:span></text:p>
      <text:p text:style-name="Text_20_body">Registered task:</text:p>
      <text:p text:style-name="P1"><text:span text:style-name="Source_20_Text">tasks.tasks.send_task_assignment_email</text:span></text:p>
      <text:p text:style-name="Text_20_body">Then you created a fresh task through Docker backend.</text:p>
      <text:h text:style-name="Heading_20_3" text:outline-level="3">Final Result</text:h>
      <text:p text:style-name="P1"><text:span text:style-name="Source_20_Text">Celery received and executed the task successfully.</text:span></text:p>
      <text:p text:style-name="Text_20_body">This confirms:</text:p>
      <text:p text:style-name="Preformatted_20_Text"><text:span text:style-name="Source_20_Text">Backend container sends task to Redis</text:span></text:p>
      <text:p text:style-name="Preformatted_20_Text"><text:span text:style-name="Source_20_Text">Redis queues the task</text:span></text:p>
      <text:p text:style-name="Preformatted_20_Text"><text:span text:style-name="Source_20_Text">Celery container receives task</text:span></text:p>
      <text:p text:style-name="Preformatted_20_Text"><text:span text:style-name="Source_20_Text">Celery executes async email notification</text:span></text:p>
      <text:p text:style-name="P1"><text:span text:style-name="Source_20_Text">Console email backend works inside Docker</text:span></text:p>
      <text:p text:style-name="Horizontal_20_Line"/>
      <text:h text:style-name="Heading_20_1" text:outline-level="1">15. Current Docker Verification Status</text:h>
      <text:p text:style-name="Preformatted_20_Text"><text:span text:style-name="Source_20_Text">Docker build <text:s text:c="20"/>: Completed</text:span></text:p>
      <text:p text:style-name="Preformatted_20_Text"><text:span text:style-name="Source_20_Text">Docker Compose startup <text:s text:c="10"/>: Completed</text:span></text:p>
      <text:p text:style-name="Preformatted_20_Text"><text:span text:style-name="Source_20_Text">PostgreSQL container <text:s text:c="12"/>: Running</text:span></text:p>
      <text:p text:style-name="Preformatted_20_Text"><text:span text:style-name="Source_20_Text">Redis container <text:s text:c="17"/>: Running</text:span></text:p>
      <text:p text:style-name="Preformatted_20_Text"><text:span text:style-name="Source_20_Text">Backend container <text:s text:c="15"/>: Running</text:span></text:p>
      <text:p text:style-name="Preformatted_20_Text"><text:span text:style-name="Source_20_Text">Celery container <text:s text:c="16"/>: Running</text:span></text:p>
      <text:p text:style-name="Preformatted_20_Text"><text:span text:style-name="Source_20_Text">Frontend container <text:s text:c="14"/>: Running</text:span></text:p>
      <text:p text:style-name="Preformatted_20_Text"><text:span text:style-name="Source_20_Text">Backend login <text:s text:c="19"/>: Verified</text:span></text:p>
      <text:p text:style-name="Preformatted_20_Text"><text:span text:style-name="Source_20_Text">Frontend access <text:s text:c="17"/>: Verified</text:span></text:p>
      <text:p text:style-name="P1"><text:span text:style-name="Source_20_Text">Celery async task execution <text:s text:c="5"/>: Verified</text:span></text:p>
      <text:p text:style-name="Horizontal_20_Line"/>
      <text:h text:style-name="Heading_20_1" text:outline-level="1">Pending Sections</text:h>
      <text:p text:style-name="Preformatted_20_Text"><text:span text:style-name="Source_20_Text">Nginx reverse proxy</text:span></text:p>
      <text:p text:style-name="Preformatted_20_Text"><text:span text:style-name="Source_20_Text">Production docker-compose adjustment</text:span></text:p>
      <text:p text:style-name="Preformatted_20_Text"><text:span text:style-name="Source_20_Text">AWS EC2 deployment</text:span></text:p>
      <text:p text:style-name="Preformatted_20_Text"><text:span text:style-name="Source_20_Text">GitHub Actions CI/CD</text:span></text:p>
      <text:p text:style-name="Preformatted_20_Text"><text:span text:style-name="Source_20_Text">README documentation</text:span></text:p>
      <text:p text:style-name="P1"><text:span text:style-name="Source_20_Text">Final project explanation for interview</text:span></text:p>
      <text:p text:style-name="Text_20_body">Next mov<text:span text:style-name="T6">ing</text:span> to <text:span text:style-name="Strong_20_Emphasis">production Nginx reverse proxy setup</text:span>, so instead of accessing frontend on <text:span text:style-name="Source_20_Text">:3000</text:span> and backend on <text:span text:style-name="Source_20_Text">:8000</text:span>, Nginx can serve the frontend and proxy backend APIs cleanly.</text:p>
      <text:h text:style-name="Heading_20_2" text:outline-level="2"><text:soft-page-break/>Documentation — Nginx Reverse Proxy Setup Completed</text:h>
      <text:h text:style-name="Heading_20_3" text:outline-level="3">Project Root</text:h>
      <text:p text:style-name="P1"><text:span text:style-name="Source_20_Text">~/Downloads/All_Gits/taskflow</text:span></text:p>
      <text:p text:style-name="Horizontal_20_Line"/>
      <text:h text:style-name="Heading_20_1" text:outline-level="1">1. Root Nginx Reverse Proxy Added</text:h>
      <text:p text:style-name="Text_20_body"><text:span text:style-name="T10">C</text:span>reated:</text:p>
      <text:p text:style-name="P1"><text:span text:style-name="Source_20_Text">nginx/default.conf</text:span></text:p>
      <text:h text:style-name="Heading_20_3" text:outline-level="3">Purpose</text:h>
      <text:p text:style-name="Text_20_body">This Nginx container works as the single public entry point for the full-stack app.</text:p>
      <text:p text:style-name="Text_20_body">Before this section, services were accessed separately:</text:p>
      <text:p text:style-name="Preformatted_20_Text"><text:span text:style-name="Source_20_Text">Frontend : http://127.0.0.1:3000/</text:span></text:p>
      <text:p text:style-name="P1"><text:span text:style-name="Source_20_Text">Backend <text:s/>: http://127.0.0.1:8000/</text:span></text:p>
      <text:p text:style-name="Text_20_body">After this section, everything works through:</text:p>
      <text:p text:style-name="Preformatted_20_Text"><text:span text:style-name="Source_20_Text">App <text:s text:c="5"/>: http://127.0.0.1/</text:span></text:p>
      <text:p text:style-name="Preformatted_20_Text"><text:span text:style-name="Source_20_Text">API <text:s text:c="5"/>: http://127.0.0.1/api/</text:span></text:p>
      <text:p text:style-name="P1"><text:span text:style-name="Source_20_Text">Admin <text:s text:c="3"/>: http://127.0.0.1/admin/</text:span></text:p>
      <text:p text:style-name="Horizontal_20_Line"/>
      <text:h text:style-name="Heading_20_1" text:outline-level="1">2. Nginx Routing Rules Added</text:h>
      <text:p text:style-name="Text_20_body">The root Nginx configuration handles:</text:p>
      <text:p text:style-name="Preformatted_20_Text"><text:span text:style-name="Source_20_Text">/api/ <text:s text:c="3"/>→ Django backend container</text:span></text:p>
      <text:p text:style-name="Preformatted_20_Text"><text:span text:style-name="Source_20_Text">/admin/ <text:s/>→ Django admin through backend container</text:span></text:p>
      <text:p text:style-name="Preformatted_20_Text"><text:span text:style-name="Source_20_Text">/static/ → Django collected static files</text:span></text:p>
      <text:p text:style-name="P6"><text:span text:style-name="Source_20_Text">/ <text:s text:c="7"/>→ React frontend container</text:span></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h text:style-name="P4" text:outline-level="3"><text:soft-page-break/>Routing Design</text:h>
      <text:p text:style-name="Preformatted_20_Text"><text:span text:style-name="Source_20_Text">Browser request to /api/auth/login/</text:span></text:p>
      <text:p text:style-name="Preformatted_20_Text"><text:span text:style-name="Source_20_Text"><text:s text:c="8"/>↓</text:span></text:p>
      <text:p text:style-name="Preformatted_20_Text"><text:span text:style-name="Source_20_Text">Nginx container</text:span></text:p>
      <text:p text:style-name="Preformatted_20_Text"><text:span text:style-name="Source_20_Text"><text:s text:c="8"/>↓</text:span></text:p>
      <text:p text:style-name="Preformatted_20_Text"><text:span text:style-name="Source_20_Text">backend:8000/api/auth/login/</text:span></text:p>
      <text:p text:style-name="Preformatted_20_Text"/>
      <text:p text:style-name="Preformatted_20_Text"><text:span text:style-name="Source_20_Text">Browser request to /admin/</text:span></text:p>
      <text:p text:style-name="Preformatted_20_Text"><text:span text:style-name="Source_20_Text"><text:s text:c="8"/>↓</text:span></text:p>
      <text:p text:style-name="Preformatted_20_Text"><text:span text:style-name="Source_20_Text">Nginx container</text:span></text:p>
      <text:p text:style-name="Preformatted_20_Text"><text:span text:style-name="Source_20_Text"><text:s text:c="8"/>↓</text:span></text:p>
      <text:p text:style-name="Preformatted_20_Text"><text:span text:style-name="Source_20_Text">backend:8000/admin/</text:span></text:p>
      <text:p text:style-name="Preformatted_20_Text"/>
      <text:p text:style-name="Preformatted_20_Text"><text:span text:style-name="Source_20_Text">Browser request to /tasks</text:span></text:p>
      <text:p text:style-name="Preformatted_20_Text"><text:span text:style-name="Source_20_Text"><text:s text:c="8"/>↓</text:span></text:p>
      <text:p text:style-name="Preformatted_20_Text"><text:span text:style-name="Source_20_Text">Nginx container</text:span></text:p>
      <text:p text:style-name="Preformatted_20_Text"><text:span text:style-name="Source_20_Text"><text:s text:c="8"/>↓</text:span></text:p>
      <text:p text:style-name="P1"><text:span text:style-name="Source_20_Text">frontend:80</text:span></text:p>
      <text:p text:style-name="Text_20_body"><text:span text:style-name="T10">A</text:span> real production deployment pattern.</text:p>
      <text:p text:style-name="Horizontal_20_Line"/>
      <text:h text:style-name="Heading_20_1" text:outline-level="1">3. Frontend Axios Updated</text:h>
      <text:p text:style-name="Text_20_body"><text:span text:style-name="T10">U</text:span>pdated:</text:p>
      <text:p text:style-name="P1"><text:span text:style-name="Source_20_Text">frontend/src/api/axios.js</text:span></text:p>
      <text:h text:style-name="Heading_20_3" text:outline-level="3">Previous API Base URL</text:h>
      <text:p text:style-name="P1"><text:span text:style-name="Source_20_Text">baseURL: "http://127.0.0.1:8000/api"</text:span></text:p>
      <text:h text:style-name="Heading_20_3" text:outline-level="3">New API Base URL</text:h>
      <text:p text:style-name="P1"><text:span text:style-name="Source_20_Text">baseURL: "/api"</text:span></text:p>
      <text:h text:style-name="Heading_20_3" text:outline-level="3">Why This Change Was Needed</text:h>
      <text:p text:style-name="Text_20_body">Now the browser calls APIs through the same host:</text:p>
      <text:p text:style-name="P1"><text:span text:style-name="Source_20_Text">http://127.0.0.1/api/...</text:span></text:p>
      <text:p text:style-name="Text_20_body">Then Nginx forwards those requests internally to Django.</text:p>
      <text:p text:style-name="Text_20_body">This avoids hardcoding backend host/port in the production frontend build.</text:p>
      <text:p text:style-name="Horizontal_20_Line"/>
      <text:p text:style-name="Text_20_body"/>
      <text:p text:style-name="Text_20_body"/>
      <text:h text:style-name="Heading_20_1" text:outline-level="1"><text:soft-page-break/>4. Docker Compose Updated for Reverse Proxy</text:h>
      <text:p text:style-name="Text_20_body"><text:span text:style-name="T10">U</text:span>pdated:</text:p>
      <text:p text:style-name="P1"><text:span text:style-name="Source_20_Text">docker-compose.yml</text:span></text:p>
      <text:h text:style-name="Heading_20_3" text:outline-level="3">New Service Added</text:h>
      <text:p text:style-name="P1"><text:span text:style-name="Source_20_Text">nginx</text:span></text:p>
      <text:h text:style-name="Heading_20_3" text:outline-level="3">Updated Services</text:h>
      <text:p text:style-name="Preformatted_20_Text"><text:span text:style-name="Source_20_Text">db</text:span></text:p>
      <text:p text:style-name="Preformatted_20_Text"><text:span text:style-name="Source_20_Text">redis</text:span></text:p>
      <text:p text:style-name="Preformatted_20_Text"><text:span text:style-name="Source_20_Text">backend</text:span></text:p>
      <text:p text:style-name="Preformatted_20_Text"><text:span text:style-name="Source_20_Text">celery</text:span></text:p>
      <text:p text:style-name="Preformatted_20_Text"><text:span text:style-name="Source_20_Text">frontend</text:span></text:p>
      <text:p text:style-name="P1"><text:span text:style-name="Source_20_Text">nginx</text:span></text:p>
      <text:h text:style-name="Heading_20_3" text:outline-level="3">Important Change</text:h>
      <text:p text:style-name="Text_20_body">The backend and frontend no longer need to expose public host ports directly.</text:p>
      <text:p text:style-name="Text_20_body">Instead:</text:p>
      <text:p text:style-name="Preformatted_20_Text"><text:span text:style-name="Source_20_Text">Nginx exposes port 80.</text:span></text:p>
      <text:p text:style-name="Preformatted_20_Text"><text:span text:style-name="Source_20_Text">Backend is internal on port 8000.</text:span></text:p>
      <text:p text:style-name="P1"><text:span text:style-name="Source_20_Text">Frontend is internal on port 80.</text:span></text:p>
      <text:p text:style-name="Horizontal_20_Line"/>
      <text:h text:style-name="Heading_20_1" text:outline-level="1">5. Health Checks Added</text:h>
      <text:p text:style-name="Text_20_body"><text:span text:style-name="T10">A</text:span>dded health checks for:</text:p>
      <text:p text:style-name="Preformatted_20_Text"><text:span text:style-name="Source_20_Text">PostgreSQL</text:span></text:p>
      <text:p text:style-name="P1"><text:span text:style-name="Source_20_Text">Redis</text:span></text:p>
      <text:h text:style-name="Heading_20_3" text:outline-level="3">Purpose</text:h>
      <text:p text:style-name="Text_20_body">This helps Docker Compose start services in the correct order.</text:p>
      <text:p text:style-name="Text_20_body">Backend starts only after:</text:p>
      <text:p text:style-name="Preformatted_20_Text"><text:span text:style-name="Source_20_Text">PostgreSQL is healthy</text:span></text:p>
      <text:p text:style-name="P1"><text:span text:style-name="Source_20_Text">Redis is healthy</text:span></text:p>
      <text:p text:style-name="Text_20_body">This reduces startup errors during deployment.</text:p>
      <text:p text:style-name="Horizontal_20_Line"/>
      <text:h text:style-name="Heading_20_1" text:outline-level="1"><text:soft-page-break/>6. Static Files Served Through Nginx</text:h>
      <text:p text:style-name="Text_20_body">The backend runs:</text:p>
      <text:p text:style-name="P1"><text:span text:style-name="Source_20_Text">python manage.py collectstatic --noinput</text:span></text:p>
      <text:p text:style-name="Text_20_body">Collected static files are stored in:</text:p>
      <text:p text:style-name="P1"><text:span text:style-name="Source_20_Text">static_volume</text:span></text:p>
      <text:p text:style-name="Text_20_body">Nginx serves them using:</text:p>
      <text:p text:style-name="Preformatted_20_Text"><text:span text:style-name="Source_20_Text">location /static/ {</text:span></text:p>
      <text:p text:style-name="Preformatted_20_Text"><text:span text:style-name="Source_20_Text"><text:s text:c="4"/>alias /app/staticfiles/;</text:span></text:p>
      <text:p text:style-name="P1"><text:span text:style-name="Source_20_Text">}</text:span></text:p>
      <text:h text:style-name="Heading_20_3" text:outline-level="3">Result</text:h>
      <text:p text:style-name="Text_20_body">Django admin static files load properly through: <text:span text:style-name="Source_20_Text"><text:span text:style-name="T8">http://127.0.0.1/admin/</text:span></text:span></text:p>
      <text:p text:style-name="Horizontal_20_Line"/>
      <text:h text:style-name="Heading_20_1" text:outline-level="1">7. Docker Compose Rebuild Completed</text:h>
      <text:p text:style-name="Text_20_body"><text:span text:style-name="T12">R</text:span>ebuilt and restarted the containers using:</text:p>
      <text:p text:style-name="Preformatted_20_Text"><text:span text:style-name="Source_20_Text">docker compose down</text:span></text:p>
      <text:p text:style-name="P1"><text:span text:style-name="Source_20_Text">docker compose up --build -d</text:span></text:p>
      <text:h text:style-name="Heading_20_3" text:outline-level="3">Result</text:h>
      <text:p text:style-name="Text_20_body">All services came up successfully.</text:p>
      <text:p text:style-name="Text_20_body">You confirmed with:</text:p>
      <text:p text:style-name="P1"><text:span text:style-name="Source_20_Text">docker compose ps</text:span></text:p>
      <text:h text:style-name="Heading_20_3" text:outline-level="3">Services Running</text:h>
      <text:p text:style-name="Text_20_body"><text:span text:style-name="T12">A</text:span>ll services displayed successfully.</text:p>
      <text:p text:style-name="Text_20_body">Expected services:</text:p>
      <text:p text:style-name="Preformatted_20_Text"><text:span text:style-name="Source_20_Text">taskflow_db</text:span></text:p>
      <text:p text:style-name="Preformatted_20_Text"><text:span text:style-name="Source_20_Text">taskflow_redis</text:span></text:p>
      <text:p text:style-name="Preformatted_20_Text"><text:span text:style-name="Source_20_Text">taskflow_backend</text:span></text:p>
      <text:p text:style-name="Preformatted_20_Text"><text:span text:style-name="Source_20_Text">taskflow_celery</text:span></text:p>
      <text:p text:style-name="Preformatted_20_Text"><text:span text:style-name="Source_20_Text">taskflow_frontend</text:span></text:p>
      <text:p text:style-name="P1"><text:span text:style-name="Source_20_Text">taskflow_nginx</text:span></text:p>
      <text:p text:style-name="Horizontal_20_Line"/>
      <text:p text:style-name="Text_20_body"/>
      <text:h text:style-name="Heading_20_1" text:outline-level="1"><text:soft-page-break/>8. Frontend Through Nginx Verified</text:h>
      <text:p text:style-name="Text_20_body"><text:span text:style-name="T12">O</text:span>pened:</text:p>
      <text:p text:style-name="P1"><text:span text:style-name="Source_20_Text">http://127.0.0.1/</text:span></text:p>
      <text:h text:style-name="Heading_20_3" text:outline-level="3">Result</text:h>
      <text:p text:style-name="Preformatted_20_Text"><text:span text:style-name="Source_20_Text">Login page opened successfully.</text:span></text:p>
      <text:p text:style-name="P1"><text:span text:style-name="Source_20_Text">Login worked successfully.</text:span></text:p>
      <text:p text:style-name="Text_20_body">This confirms:</text:p>
      <text:p text:style-name="Preformatted_20_Text"><text:span text:style-name="Source_20_Text">Nginx → React frontend routing works.</text:span></text:p>
      <text:p text:style-name="Preformatted_20_Text"><text:span text:style-name="Source_20_Text">React production build works.</text:span></text:p>
      <text:p text:style-name="P1"><text:span text:style-name="Source_20_Text">React Router works through Nginx.</text:span></text:p>
      <text:p text:style-name="Horizontal_20_Line"/>
      <text:h text:style-name="Heading_20_1" text:outline-level="1">9. Backend Through Nginx Verified</text:h>
      <text:p text:style-name="Text_20_body"><text:span text:style-name="T12">C</text:span>onfirmed login worked through Nginx.</text:p>
      <text:h text:style-name="Heading_20_3" text:outline-level="3">API Path Used</text:h>
      <text:p text:style-name="P1"><text:span text:style-name="Source_20_Text">http://127.0.0.1/api/auth/login/</text:span></text:p>
      <text:h text:style-name="Heading_20_3" text:outline-level="3">Result</text:h>
      <text:p text:style-name="P1"><text:span text:style-name="Source_20_Text">Login worked successfully.</text:span></text:p>
      <text:p text:style-name="Text_20_body">This confirms:</text:p>
      <text:p text:style-name="Preformatted_20_Text"><text:span text:style-name="Source_20_Text">Nginx → Django backend proxy works.</text:span></text:p>
      <text:p text:style-name="Preformatted_20_Text"><text:span text:style-name="Source_20_Text">JWT login works through reverse proxy.</text:span></text:p>
      <text:p text:style-name="P1"><text:span text:style-name="Source_20_Text">Frontend can call backend using /api.</text:span></text:p>
      <text:p text:style-name="Horizontal_20_Line"/>
      <text:h text:style-name="Heading_20_1" text:outline-level="1">10. Django Admin Through Nginx Verified</text:h>
      <text:p text:style-name="P7"><text:span text:style-name="T12">O</text:span>pened: <text:span text:style-name="Source_20_Text"><text:span text:style-name="T8">http://127.0.0.1/admin/</text:span></text:span></text:p>
      <text:h text:style-name="Heading_20_3" text:outline-level="3">Result</text:h>
      <text:p text:style-name="P1"><text:span text:style-name="Source_20_Text">Django admin opened successfully.</text:span></text:p>
      <text:p text:style-name="Text_20_body">This confirms:</text:p>
      <text:p text:style-name="Preformatted_20_Text"><text:span text:style-name="Source_20_Text">/admin/ proxy works.</text:span></text:p>
      <text:p text:style-name="Preformatted_20_Text"><text:span text:style-name="Source_20_Text">Django admin static files are served correctly.</text:span></text:p>
      <text:p text:style-name="P1"><text:span text:style-name="Source_20_Text">collectstatic and static volume are working.</text:span></text:p>
      <text:p text:style-name="Horizontal_20_Line"/>
      <text:h text:style-name="Heading_20_1" text:outline-level="1"><text:soft-page-break/>11. Celery Through Nginx Flow Verified</text:h>
      <text:p text:style-name="Text_20_body"><text:span text:style-name="T12">C</text:span>reated a task through the Nginx-served frontend/backend flow.</text:p>
      <text:h text:style-name="Heading_20_3" text:outline-level="3">Result</text:h>
      <text:p text:style-name="P1"><text:span text:style-name="Source_20_Text">Task creation triggered Celery successfully.</text:span></text:p>
      <text:p text:style-name="Text_20_body">This confirms the complete production-style flow:</text:p>
      <text:p text:style-name="Preformatted_20_Text"><text:span text:style-name="Source_20_Text">React frontend</text:span></text:p>
      <text:p text:style-name="Preformatted_20_Text"><text:span text:style-name="Source_20_Text"><text:s text:c="4"/>↓</text:span></text:p>
      <text:p text:style-name="Preformatted_20_Text"><text:span text:style-name="Source_20_Text">Nginx</text:span></text:p>
      <text:p text:style-name="Preformatted_20_Text"><text:span text:style-name="Source_20_Text"><text:s text:c="4"/>↓</text:span></text:p>
      <text:p text:style-name="Preformatted_20_Text"><text:span text:style-name="Source_20_Text">Django backend</text:span></text:p>
      <text:p text:style-name="Preformatted_20_Text"><text:span text:style-name="Source_20_Text"><text:s text:c="4"/>↓</text:span></text:p>
      <text:p text:style-name="Preformatted_20_Text"><text:span text:style-name="Source_20_Text">Redis queue</text:span></text:p>
      <text:p text:style-name="Preformatted_20_Text"><text:span text:style-name="Source_20_Text"><text:s text:c="4"/>↓</text:span></text:p>
      <text:p text:style-name="Preformatted_20_Text"><text:span text:style-name="Source_20_Text">Celery worker</text:span></text:p>
      <text:p text:style-name="Preformatted_20_Text"><text:span text:style-name="Source_20_Text"><text:s text:c="4"/>↓</text:span></text:p>
      <text:p text:style-name="P1"><text:span text:style-name="Source_20_Text">Console email notification</text:span></text:p>
      <text:p text:style-name="Horizontal_20_Line"/>
      <text:h text:style-name="Heading_20_1" text:outline-level="1">Current Docker Architecture</text:h>
      <text:p text:style-name="Preformatted_20_Text"><text:span text:style-name="Source_20_Text">Browser</text:span></text:p>
      <text:p text:style-name="Preformatted_20_Text"><text:span text:style-name="Source_20_Text"><text:s text:c="2"/>|</text:span></text:p>
      <text:p text:style-name="Preformatted_20_Text"><text:span text:style-name="Source_20_Text"><text:s text:c="2"/>| http://127.0.0.1/</text:span></text:p>
      <text:p text:style-name="Preformatted_20_Text"><text:span text:style-name="Source_20_Text"><text:s text:c="2"/>v</text:span></text:p>
      <text:p text:style-name="Preformatted_20_Text"><text:span text:style-name="Source_20_Text">Nginx reverse proxy container</text:span></text:p>
      <text:p text:style-name="Preformatted_20_Text"><text:span text:style-name="Source_20_Text"><text:s text:c="2"/>|</text:span></text:p>
      <text:p text:style-name="Preformatted_20_Text"><text:span text:style-name="Source_20_Text"><text:s text:c="2"/>|-- / <text:s text:c="13"/>→ React frontend container</text:span></text:p>
      <text:p text:style-name="Preformatted_20_Text"><text:span text:style-name="Source_20_Text"><text:s text:c="2"/>|-- /api/ <text:s text:c="9"/>→ Django backend container</text:span></text:p>
      <text:p text:style-name="Preformatted_20_Text"><text:span text:style-name="Source_20_Text"><text:s text:c="2"/>|-- /admin/ <text:s text:c="7"/>→ Django backend container</text:span></text:p>
      <text:p text:style-name="Preformatted_20_Text"><text:span text:style-name="Source_20_Text"><text:s text:c="2"/>|-- /static/ <text:s text:c="6"/>→ Django static volume</text:span></text:p>
      <text:p text:style-name="Preformatted_20_Text"><text:span text:style-name="Source_20_Text"><text:s text:c="25"/>|</text:span></text:p>
      <text:p text:style-name="Preformatted_20_Text"><text:span text:style-name="Source_20_Text"><text:s text:c="25"/>|-- Django backend → PostgreSQL container</text:span></text:p>
      <text:p text:style-name="Preformatted_20_Text"><text:span text:style-name="Source_20_Text"><text:s text:c="25"/>|-- Django backend → Redis container</text:span></text:p>
      <text:p text:style-name="P1"><text:span text:style-name="Source_20_Text"><text:s text:c="25"/>|-- Celery worker <text:s/>→ Redis + PostgreSQL</text:span></text:p>
      <text:p text:style-name="Horizontal_20_Line"/>
      <text:h text:style-name="Heading_20_1" text:outline-level="1">Features Completed So Far</text:h>
      <text:p text:style-name="Preformatted_20_Text"><text:span text:style-name="Source_20_Text">Django REST Framework backend</text:span></text:p>
      <text:p text:style-name="Preformatted_20_Text"><text:span text:style-name="Source_20_Text">PostgreSQL database</text:span></text:p>
      <text:p text:style-name="Preformatted_20_Text"><text:span text:style-name="Source_20_Text">Custom user model</text:span></text:p>
      <text:p text:style-name="Preformatted_20_Text"><text:span text:style-name="Source_20_Text">Admin/User role system</text:span></text:p>
      <text:p text:style-name="Preformatted_20_Text"><text:span text:style-name="Source_20_Text">JWT authentication</text:span></text:p>
      <text:p text:style-name="Preformatted_20_Text"><text:span text:style-name="Source_20_Text">User management APIs</text:span></text:p>
      <text:p text:style-name="Preformatted_20_Text"><text:span text:style-name="Source_20_Text">Task CRUD APIs</text:span></text:p>
      <text:p text:style-name="Preformatted_20_Text"><text:span text:style-name="Source_20_Text">Task assignment</text:span></text:p>
      <text:p text:style-name="Preformatted_20_Text"><text:span text:style-name="Source_20_Text">Task filtering</text:span></text:p>
      <text:p text:style-name="Preformatted_20_Text"><text:span text:style-name="Source_20_Text">Task status update</text:span></text:p>
      <text:p text:style-name="Preformatted_20_Text"><text:span text:style-name="Source_20_Text">Dashboard APIs</text:span></text:p>
      <text:p text:style-name="Preformatted_20_Text"><text:span text:style-name="Source_20_Text">Redis broker</text:span></text:p>
      <text:p text:style-name="Preformatted_20_Text"><text:span text:style-name="Source_20_Text">Celery worker</text:span></text:p>
      <text:p text:style-name="Preformatted_20_Text"><text:soft-page-break/><text:span text:style-name="Source_20_Text">Async email notification</text:span></text:p>
      <text:p text:style-name="Preformatted_20_Text"><text:span text:style-name="Source_20_Text">React frontend</text:span></text:p>
      <text:p text:style-name="Preformatted_20_Text"><text:span text:style-name="Source_20_Text">Role-based frontend routing</text:span></text:p>
      <text:p text:style-name="Preformatted_20_Text"><text:span text:style-name="Source_20_Text">Admin dashboard UI</text:span></text:p>
      <text:p text:style-name="Preformatted_20_Text"><text:span text:style-name="Source_20_Text">User dashboard UI</text:span></text:p>
      <text:p text:style-name="Preformatted_20_Text"><text:span text:style-name="Source_20_Text">Task list UI</text:span></text:p>
      <text:p text:style-name="Preformatted_20_Text"><text:span text:style-name="Source_20_Text">Task creation UI</text:span></text:p>
      <text:p text:style-name="Preformatted_20_Text"><text:span text:style-name="Source_20_Text">Postman collection</text:span></text:p>
      <text:p text:style-name="Preformatted_20_Text"><text:span text:style-name="Source_20_Text">PyTest backend tests</text:span></text:p>
      <text:p text:style-name="Preformatted_20_Text"><text:span text:style-name="Source_20_Text">Dockerized backend</text:span></text:p>
      <text:p text:style-name="Preformatted_20_Text"><text:span text:style-name="Source_20_Text">Dockerized frontend</text:span></text:p>
      <text:p text:style-name="Preformatted_20_Text"><text:span text:style-name="Source_20_Text">Dockerized PostgreSQL</text:span></text:p>
      <text:p text:style-name="Preformatted_20_Text"><text:span text:style-name="Source_20_Text">Dockerized Redis</text:span></text:p>
      <text:p text:style-name="Preformatted_20_Text"><text:span text:style-name="Source_20_Text">Dockerized Celery</text:span></text:p>
      <text:p text:style-name="Preformatted_20_Text"><text:span text:style-name="Source_20_Text">Gunicorn backend server</text:span></text:p>
      <text:p text:style-name="Preformatted_20_Text"><text:span text:style-name="Source_20_Text">Nginx React frontend server</text:span></text:p>
      <text:p text:style-name="P1"><text:span text:style-name="Source_20_Text">Root Nginx reverse proxy</text:span></text:p>
      <text:p text:style-name="Horizontal_20_Line"/>
      <text:h text:style-name="Heading_20_1" text:outline-level="1">Current Completion Status</text:h>
      <text:p text:style-name="Preformatted_20_Text"><text:span text:style-name="Source_20_Text">Backend APIs <text:s text:c="16"/>: Completed</text:span></text:p>
      <text:p text:style-name="Preformatted_20_Text"><text:span text:style-name="Source_20_Text">Frontend UI <text:s text:c="17"/>: Completed</text:span></text:p>
      <text:p text:style-name="Preformatted_20_Text"><text:span text:style-name="Source_20_Text">Redis + Celery <text:s text:c="14"/>: Completed</text:span></text:p>
      <text:p text:style-name="Preformatted_20_Text"><text:span text:style-name="Source_20_Text">Postman testing <text:s text:c="13"/>: Completed</text:span></text:p>
      <text:p text:style-name="Preformatted_20_Text"><text:span text:style-name="Source_20_Text">PyTest testing <text:s text:c="14"/>: Completed</text:span></text:p>
      <text:p text:style-name="Preformatted_20_Text"><text:span text:style-name="Source_20_Text">Docker setup <text:s text:c="16"/>: Completed</text:span></text:p>
      <text:p text:style-name="Preformatted_20_Text"><text:span text:style-name="Source_20_Text">Gunicorn setup <text:s text:c="14"/>: Completed</text:span></text:p>
      <text:p text:style-name="Preformatted_20_Text"><text:span text:style-name="Source_20_Text">Nginx reverse proxy <text:s text:c="9"/>: Completed</text:span></text:p>
      <text:p text:style-name="P1"><text:span text:style-name="Source_20_Text">Local production simulation <text:s/>: Completed</text:span></text:p>
      <text:p text:style-name="Horizontal_20_Line"/>
      <text:h text:style-name="Heading_20_1" text:outline-level="1">Pending Sections</text:h>
      <text:p text:style-name="Preformatted_20_Text"><text:span text:style-name="Source_20_Text">AWS EC2 deployment preparation</text:span></text:p>
      <text:p text:style-name="Preformatted_20_Text"><text:span text:style-name="Source_20_Text">AWS EC2 actual deployment</text:span></text:p>
      <text:p text:style-name="Preformatted_20_Text"><text:span text:style-name="Source_20_Text">GitHub Actions CI/CD</text:span></text:p>
      <text:p text:style-name="Preformatted_20_Text"><text:span text:style-name="Source_20_Text">README documentation</text:span></text:p>
      <text:p text:style-name="Preformatted_20_Text"><text:span text:style-name="Source_20_Text">Final interview explanation</text:span></text:p>
      <text:p text:style-name="P1"><text:span text:style-name="Source_20_Text">Resume project polishing</text:span></text:p>
      <text:p text:style-name="Text_20_body">Next mov<text:span text:style-name="T12">ing</text:span> to <text:span text:style-name="Strong_20_Emphasis">AWS EC2 deployment preparation</text:span>: GitHub repository cleanup, production environment variables, EC2 security group ports, Docker installation commands, and deployment checklist.</text:p>
      <text:p text:style-name="Text_20_body"/>
      <text:p text:style-name="Text_20_body"/>
      <text:p text:style-name="Text_20_body"/>
      <text:p text:style-name="Text_20_body"/>
      <text:p text:style-name="Text_20_body"/>
      <text:p text:style-name="Text_20_body"/>
      <text:h text:style-name="Heading_20_2" text:outline-level="2"><text:soft-page-break/>Documentation — Terraform + AWS EC2 Deployment Completed</text:h>
      <text:h text:style-name="Heading_20_3" text:outline-level="3">Project Root</text:h>
      <text:p text:style-name="P1"><text:span text:style-name="Source_20_Text">~/Downloads/All_Gits/taskflow</text:span></text:p>
      <text:h text:style-name="Heading_20_3" text:outline-level="3">Terraform Folder</text:h>
      <text:p text:style-name="Preformatted_20_Text"><text:span text:style-name="Source_20_Text">taskflow/terraform/</text:span></text:p>
      <text:p text:style-name="Preformatted_20_Text"><text:span text:style-name="Source_20_Text">│</text:span></text:p>
      <text:p text:style-name="Preformatted_20_Text"><text:span text:style-name="Source_20_Text">├── main.tf</text:span></text:p>
      <text:p text:style-name="Preformatted_20_Text"><text:span text:style-name="Source_20_Text">├── variables.tf</text:span></text:p>
      <text:p text:style-name="Preformatted_20_Text"><text:span text:style-name="Source_20_Text">├── outputs.tf</text:span></text:p>
      <text:p text:style-name="Preformatted_20_Text"><text:span text:style-name="Source_20_Text">├── terraform.tfvars</text:span></text:p>
      <text:p text:style-name="P1"><text:span text:style-name="Source_20_Text">└── user_data.sh</text:span></text:p>
      <text:p text:style-name="Horizontal_20_Line"/>
      <text:h text:style-name="Heading_20_1" text:outline-level="1">1. Deployment Method Changed to Terraform</text:h>
      <text:p text:style-name="Text_20_body">Instead of manually creating AWS resources from the AWS Console, <text:span text:style-name="T13">U</text:span>sed <text:span text:style-name="Strong_20_Emphasis">Terraform</text:span>.</text:p>
      <text:h text:style-name="Heading_20_3" text:outline-level="3">Why Terraform Was Used</text:h>
      <text:p text:style-name="Preformatted_20_Text"><text:span text:style-name="Source_20_Text">Infrastructure is reproducible</text:span></text:p>
      <text:p text:style-name="Preformatted_20_Text"><text:span text:style-name="Source_20_Text">EC2 setup is version-controlled</text:span></text:p>
      <text:p text:style-name="Preformatted_20_Text"><text:span text:style-name="Source_20_Text">Security group rules are documented in code</text:span></text:p>
      <text:p text:style-name="Preformatted_20_Text"><text:span text:style-name="Source_20_Text">VPC/subnet/networking can be recreated anytime</text:span></text:p>
      <text:p text:style-name="P1"><text:span text:style-name="Source_20_Text">Better DevOps/IaC alignment for resume and interviews</text:span></text:p>
      <text:p text:style-name="Text_20_body">This improves the project because it now includes <text:span text:style-name="Strong_20_Emphasis">Infrastructure as Code</text:span>.</text:p>
      <text:p text:style-name="Horizontal_20_Line"/>
      <text:h text:style-name="Heading_20_1" text:outline-level="1">2. Terraform Resources Created</text:h>
      <text:p text:style-name="Text_20_body">Terraform created the required AWS infrastructure:</text:p>
      <text:p text:style-name="Preformatted_20_Text"><text:span text:style-name="Source_20_Text">Custom VPC</text:span></text:p>
      <text:p text:style-name="Preformatted_20_Text"><text:span text:style-name="Source_20_Text">Public subnet</text:span></text:p>
      <text:p text:style-name="Preformatted_20_Text"><text:span text:style-name="Source_20_Text">Internet gateway</text:span></text:p>
      <text:p text:style-name="Preformatted_20_Text"><text:span text:style-name="Source_20_Text">Route table</text:span></text:p>
      <text:p text:style-name="Preformatted_20_Text"><text:span text:style-name="Source_20_Text">Route table association</text:span></text:p>
      <text:p text:style-name="Preformatted_20_Text"><text:span text:style-name="Source_20_Text">Security group</text:span></text:p>
      <text:p text:style-name="Preformatted_20_Text"><text:span text:style-name="Source_20_Text">EC2 instance</text:span></text:p>
      <text:p text:style-name="P1"><text:span text:style-name="Source_20_Text">Root EBS volume</text:span></text:p>
      <text:p text:style-name="Horizontal_20_Line"/>
      <text:p text:style-name="Text_20_body"/>
      <text:h text:style-name="Heading_20_1" text:outline-level="1"><text:soft-page-break/>3. Custom VPC Issue Fixed</text:h>
      <text:p text:style-name="Text_20_body">Initially, Terraform failed with:</text:p>
      <text:p text:style-name="P1"><text:span text:style-name="Source_20_Text">VPCIdNotSpecified: No default VPC for this user</text:span></text:p>
      <text:h text:style-name="Heading_20_3" text:outline-level="3">Reason</text:h>
      <text:p text:style-name="Text_20_body">Your AWS account/region did not have a default VPC.</text:p>
      <text:h text:style-name="Heading_20_3" text:outline-level="3">Fix</text:h>
      <text:p text:style-name="Text_20_body">We updated <text:span text:style-name="Source_20_Text">main.tf</text:span> to create a custom VPC instead of relying on AWS default networking.</text:p>
      <text:p text:style-name="Text_20_body">Now Terraform creates:</text:p>
      <text:p text:style-name="Preformatted_20_Text"><text:span text:style-name="Source_20_Text">taskflow-vpc</text:span></text:p>
      <text:p text:style-name="Preformatted_20_Text"><text:span text:style-name="Source_20_Text">taskflow-public-subnet</text:span></text:p>
      <text:p text:style-name="Preformatted_20_Text"><text:span text:style-name="Source_20_Text">taskflow-igw</text:span></text:p>
      <text:p text:style-name="Preformatted_20_Text"><text:span text:style-name="Source_20_Text">taskflow-public-rt</text:span></text:p>
      <text:p text:style-name="Preformatted_20_Text"><text:span text:style-name="Source_20_Text">taskflow-sg</text:span></text:p>
      <text:p text:style-name="P1"><text:span text:style-name="Source_20_Text">taskflow-server</text:span></text:p>
      <text:p text:style-name="Text_20_body">This is a better production-style setup.</text:p>
      <text:p text:style-name="Horizontal_20_Line"/>
      <text:h text:style-name="Heading_20_1" text:outline-level="1">4. Security Group Configured</text:h>
      <text:p text:style-name="Text_20_body">The security group allows:</text:p>
      <text:p text:style-name="Preformatted_20_Text"><text:span text:style-name="Source_20_Text">SSH <text:s text:c="2"/>port 22 <text:s text:c="2"/>only from your public IPv4 /32</text:span></text:p>
      <text:p text:style-name="Preformatted_20_Text"><text:span text:style-name="Source_20_Text">HTTP <text:s/>port 80 <text:s text:c="2"/>from anywhere</text:span></text:p>
      <text:p text:style-name="P1"><text:span text:style-name="Source_20_Text">HTTPS port 443 <text:s/>from anywhere, reserved for future SSL</text:span></text:p>
      <text:h text:style-name="Heading_20_3" text:outline-level="3">Publicly Exposed</text:h>
      <text:p text:style-name="Preformatted_20_Text"><text:span text:style-name="Source_20_Text">80</text:span></text:p>
      <text:p text:style-name="P1"><text:span text:style-name="Source_20_Text">443</text:span></text:p>
      <text:h text:style-name="Heading_20_3" text:outline-level="3">Not Publicly Exposed</text:h>
      <text:p text:style-name="Preformatted_20_Text"><text:span text:style-name="Source_20_Text">8000</text:span></text:p>
      <text:p text:style-name="Preformatted_20_Text"><text:span text:style-name="Source_20_Text">3000</text:span></text:p>
      <text:p text:style-name="Preformatted_20_Text"><text:span text:style-name="Source_20_Text">5432</text:span></text:p>
      <text:p text:style-name="Preformatted_20_Text"><text:span text:style-name="Source_20_Text">5433</text:span></text:p>
      <text:p text:style-name="Preformatted_20_Text"><text:span text:style-name="Source_20_Text">6379</text:span></text:p>
      <text:p text:style-name="P1"><text:span text:style-name="Source_20_Text">6380</text:span></text:p>
      <text:p text:style-name="Text_20_body">This is correct because Nginx is the only public entry point.</text:p>
      <text:p text:style-name="Horizontal_20_Line"/>
      <text:h text:style-name="Heading_20_1" text:outline-level="1"><text:soft-page-break/>5. IPv6 CIDR Issue Fixed</text:h>
      <text:p text:style-name="Text_20_body">At first, <text:span text:style-name="Source_20_Text">terraform.tfvars</text:span> used an IPv6 address:</text:p>
      <text:p text:style-name="P1"><text:span text:style-name="Source_20_Text">2401:4900:...</text:span></text:p>
      <text:p text:style-name="Text_20_body">Terraform failed because the security group was configured with:</text:p>
      <text:p text:style-name="P1"><text:span text:style-name="Source_20_Text">cidr_blocks</text:span></text:p>
      <text:p text:style-name="Text_20_body">which expects IPv4.</text:p>
      <text:h text:style-name="Heading_20_3" text:outline-level="3">Fix</text:h>
      <text:p text:style-name="Text_20_body">We used public IPv4 in CIDR format:</text:p>
      <text:p text:style-name="P1"><text:span text:style-name="Source_20_Text">YOUR_PUBLIC_IPV4/32</text:span></text:p>
      <text:p text:style-name="Text_20_body">This allowed SSH access to be restricted safely.</text:p>
      <text:p text:style-name="Horizontal_20_Line"/>
      <text:h text:style-name="Heading_20_1" text:outline-level="1">6. EC2 Instance Created</text:h>
      <text:p text:style-name="Text_20_body">Terraform created an EC2 instance using:</text:p>
      <text:p text:style-name="Preformatted_20_Text"><text:span text:style-name="Source_20_Text">Ubuntu 24.04 LTS</text:span></text:p>
      <text:p text:style-name="Preformatted_20_Text"><text:span text:style-name="Source_20_Text">t3.small</text:span></text:p>
      <text:p text:style-name="Preformatted_20_Text"><text:span text:style-name="Source_20_Text">20 GB gp3 root volume</text:span></text:p>
      <text:p text:style-name="Preformatted_20_Text"><text:span text:style-name="Source_20_Text">ap-south-1 region</text:span></text:p>
      <text:p text:style-name="P1"><text:span text:style-name="Source_20_Text">Existing AWS key pair: taskflow-key</text:span></text:p>
      <text:p text:style-name="Text_20_body">The AMI was selected dynamically using Terraform’s <text:span text:style-name="Source_20_Text">aws_ami</text:span> data source, so we did not hardcode an AMI ID.</text:p>
      <text:p text:style-name="Horizontal_20_Line"/>
      <text:h text:style-name="Heading_20_1" text:outline-level="1">7. EC2 Bootstrapping Added with user_data</text:h>
      <text:p text:style-name="Text_20_body"><text:span text:style-name="T14">C</text:span>reated:</text:p>
      <text:p text:style-name="P1"><text:span text:style-name="Source_20_Text">terraform/user_data.sh</text:span></text:p>
      <text:h text:style-name="Heading_20_3" text:outline-level="3">It Installs</text:h>
      <text:p text:style-name="Preformatted_20_Text"><text:span text:style-name="Source_20_Text">Git</text:span></text:p>
      <text:p text:style-name="Preformatted_20_Text"><text:span text:style-name="Source_20_Text">Docker</text:span></text:p>
      <text:p text:style-name="P1"><text:span text:style-name="Source_20_Text">Docker Compose plugin</text:span></text:p>
      <text:h text:style-name="Heading_20_3" text:outline-level="3">It Also</text:h>
      <text:p text:style-name="Preformatted_20_Text"><text:span text:style-name="Source_20_Text">Starts Docker</text:span></text:p>
      <text:p text:style-name="Preformatted_20_Text"><text:span text:style-name="Source_20_Text">Enables Docker on boot</text:span></text:p>
      <text:p text:style-name="Preformatted_20_Text"><text:span text:style-name="Source_20_Text">Adds ubuntu user to docker group</text:span></text:p>
      <text:p text:style-name="P1"><text:span text:style-name="Source_20_Text">Creates a deployment directory</text:span></text:p>
      <text:p text:style-name="Text_20_body"><text:soft-page-break/>This means the EC2 instance is prepared automatically after Terraform creates it.</text:p>
      <text:p text:style-name="Horizontal_20_Line"/>
      <text:h text:style-name="Heading_20_1" text:outline-level="1">8. Terraform Outputs Added</text:h>
      <text:p text:style-name="Text_20_body"><text:span text:style-name="T14">C</text:span>onfigured:</text:p>
      <text:p text:style-name="P1"><text:span text:style-name="Source_20_Text">outputs.tf</text:span></text:p>
      <text:h text:style-name="Heading_20_3" text:outline-level="3">Outputs</text:h>
      <text:p text:style-name="Preformatted_20_Text"><text:span text:style-name="Source_20_Text">ec2_public_ip</text:span></text:p>
      <text:p text:style-name="Preformatted_20_Text"><text:span text:style-name="Source_20_Text">ec2_public_dns</text:span></text:p>
      <text:p text:style-name="Preformatted_20_Text"><text:span text:style-name="Source_20_Text">ssh_command</text:span></text:p>
      <text:p text:style-name="Preformatted_20_Text"><text:span text:style-name="Source_20_Text">app_url</text:span></text:p>
      <text:p text:style-name="P1"><text:span text:style-name="Source_20_Text">admin_url</text:span></text:p>
      <text:p text:style-name="Text_20_body">These make deployment easier because Terraform directly gives the connection command and app URLs.</text:p>
      <text:p text:style-name="Horizontal_20_Line"/>
      <text:h text:style-name="Heading_20_1" text:outline-level="1">9. Project Deployed on EC2</text:h>
      <text:p text:style-name="Text_20_body">After EC2 was ready, the project was cloned from GitHub onto the server.</text:p>
      <text:p text:style-name="Text_20_body">Then we ran Docker Compose from the folder containing:</text:p>
      <text:p text:style-name="P1"><text:span text:style-name="Source_20_Text">docker-compose.yml</text:span></text:p>
      <text:p text:style-name="Text_20_body">Correct command location:</text:p>
      <text:p text:style-name="P1"><text:span text:style-name="Source_20_Text">~/taskflow-fullstack</text:span></text:p>
      <text:p text:style-name="Text_20_body">Correct command:</text:p>
      <text:p text:style-name="P1"><text:span text:style-name="Source_20_Text">docker compose up --build -d</text:span></text:p>
      <text:p text:style-name="Horizontal_20_Line"/>
      <text:h text:style-name="Heading_20_1" text:outline-level="1">10. Docker Compose Issue Fixed</text:h>
      <text:p text:style-name="Text_20_body">Initially, this error appeared:</text:p>
      <text:p text:style-name="P1"><text:span text:style-name="Source_20_Text">no configuration file provided: not found</text:span></text:p>
      <text:h text:style-name="Heading_20_3" text:outline-level="3">Reason</text:h>
      <text:p text:style-name="Text_20_body">The command was run from:</text:p>
      <text:p text:style-name="P1"><text:span text:style-name="Source_20_Text">/home/ubuntu</text:span></text:p>
      <text:p text:style-name="Text_20_body">instead of the project folder.</text:p>
      <text:h text:style-name="Heading_20_3" text:outline-level="3"><text:soft-page-break/>Fix</text:h>
      <text:p text:style-name="Text_20_body"><text:span text:style-name="T14">M</text:span>oved into the cloned project directory where <text:span text:style-name="Source_20_Text">docker-compose.yml</text:span> exists.</text:p>
      <text:p text:style-name="Horizontal_20_Line"/>
      <text:h text:style-name="Heading_20_1" text:outline-level="1">11. Backend Restart Issue Fixed</text:h>
      <text:p text:style-name="Text_20_body">At one stage, the backend container showed:</text:p>
      <text:p text:style-name="P1"><text:span text:style-name="Source_20_Text">Restarting (1)</text:span></text:p>
      <text:h text:style-name="Heading_20_3" text:outline-level="3">Meaning</text:h>
      <text:p text:style-name="Text_20_body">The backend container was crashing, so Django admin and API login could not work.</text:p>
      <text:h text:style-name="Heading_20_3" text:outline-level="3">Fix</text:h>
      <text:p text:style-name="Text_20_body">The backend issue was resolved after checking configuration and restarting containers correctly.</text:p>
      <text:p text:style-name="Text_20_body">Final result:</text:p>
      <text:p text:style-name="Preformatted_20_Text"><text:span text:style-name="Source_20_Text">Backend container running</text:span></text:p>
      <text:p text:style-name="Preformatted_20_Text"><text:span text:style-name="Source_20_Text">Login working</text:span></text:p>
      <text:p text:style-name="Preformatted_20_Text"><text:span text:style-name="Source_20_Text">Admin working</text:span></text:p>
      <text:p text:style-name="P1"><text:span text:style-name="Source_20_Text">API working</text:span></text:p>
      <text:p text:style-name="Horizontal_20_Line"/>
      <text:h text:style-name="Heading_20_1" text:outline-level="1">12. Admin User Created and Verified</text:h>
      <text:p text:style-name="Text_20_body"><text:span text:style-name="T14">C</text:span>reated/updated the admin user inside the Docker backend database.</text:p>
      <text:h text:style-name="Heading_20_3" text:outline-level="3">Final Admin Status</text:h>
      <text:p text:style-name="Preformatted_20_Text"><text:span text:style-name="Source_20_Text">Username: admin</text:span></text:p>
      <text:p text:style-name="Preformatted_20_Text"><text:span text:style-name="Source_20_Text">Role: ADMIN</text:span></text:p>
      <text:p text:style-name="Preformatted_20_Text"><text:span text:style-name="Source_20_Text">is_staff: True</text:span></text:p>
      <text:p text:style-name="Preformatted_20_Text"><text:span text:style-name="Source_20_Text">is_superuser: True</text:span></text:p>
      <text:p text:style-name="P1"><text:span text:style-name="Source_20_Text">Login: Working</text:span></text:p>
      <text:p text:style-name="Text_20_body">This confirmed that the EC2 PostgreSQL container had the correct user data.</text:p>
      <text:p text:style-name="Horizontal_20_Line"/>
      <text:h text:style-name="Heading_20_1" text:outline-level="1">13. EC2 Environment Configured</text:h>
      <text:p text:style-name="Text_20_body">The Docker environment file was updated for EC2:</text:p>
      <text:p text:style-name="P1"><text:span text:style-name="Source_20_Text">backend/.env.docker</text:span></text:p>
      <text:h text:style-name="Heading_20_3" text:outline-level="3">Important Values</text:h>
      <text:p text:style-name="Preformatted_20_Text"><text:span text:style-name="Source_20_Text">DEBUG=False</text:span></text:p>
      <text:p text:style-name="Preformatted_20_Text"><text:span text:style-name="Source_20_Text">ALLOWED_HOSTS=localhost,127.0.0.1,YOUR_EC2_PUBLIC_IP</text:span></text:p>
      <text:p text:style-name="Preformatted_20_Text"><text:soft-page-break/><text:span text:style-name="Source_20_Text">CORS_ALLOWED_ORIGINS=http://YOUR_EC2_PUBLIC_IP</text:span></text:p>
      <text:p text:style-name="Preformatted_20_Text"><text:span text:style-name="Source_20_Text">CSRF_TRUSTED_ORIGINS=http://YOUR_EC2_PUBLIC_IP</text:span></text:p>
      <text:p text:style-name="Preformatted_20_Text"><text:span text:style-name="Source_20_Text">DB_HOST=db</text:span></text:p>
      <text:p text:style-name="Preformatted_20_Text"><text:span text:style-name="Source_20_Text">DB_PORT=5432</text:span></text:p>
      <text:p text:style-name="Preformatted_20_Text"><text:span text:style-name="Source_20_Text">CELERY_BROKER_URL=redis://redis:6379/0</text:span></text:p>
      <text:p text:style-name="P1"><text:span text:style-name="Source_20_Text">CELERY_RESULT_BACKEND=redis://redis:6379/0</text:span></text:p>
      <text:p text:style-name="Text_20_body">This allowed Django and React to work through the EC2 public IP.</text:p>
      <text:p text:style-name="Horizontal_20_Line"/>
      <text:h text:style-name="Heading_20_1" text:outline-level="1">14. Final EC2 Services Running</text:h>
      <text:p text:style-name="Text_20_body">The deployed app uses these containers:</text:p>
      <text:p text:style-name="Preformatted_20_Text"><text:span text:style-name="Source_20_Text">taskflow_db</text:span></text:p>
      <text:p text:style-name="Preformatted_20_Text"><text:span text:style-name="Source_20_Text">taskflow_redis</text:span></text:p>
      <text:p text:style-name="Preformatted_20_Text"><text:span text:style-name="Source_20_Text">taskflow_backend</text:span></text:p>
      <text:p text:style-name="Preformatted_20_Text"><text:span text:style-name="Source_20_Text">taskflow_celery</text:span></text:p>
      <text:p text:style-name="Preformatted_20_Text"><text:span text:style-name="Source_20_Text">taskflow_frontend</text:span></text:p>
      <text:p text:style-name="P1"><text:span text:style-name="Source_20_Text">taskflow_nginx</text:span></text:p>
      <text:h text:style-name="Heading_20_3" text:outline-level="3">Responsibilities</text:h>
      <text:p text:style-name="Preformatted_20_Text"><text:span text:style-name="Source_20_Text">taskflow_db <text:s text:c="7"/>: PostgreSQL database</text:span></text:p>
      <text:p text:style-name="Preformatted_20_Text"><text:span text:style-name="Source_20_Text">taskflow_redis <text:s text:c="4"/>: Redis message broker</text:span></text:p>
      <text:p text:style-name="Preformatted_20_Text"><text:span text:style-name="Source_20_Text">taskflow_backend <text:s text:c="2"/>: Django + DRF + Gunicorn</text:span></text:p>
      <text:p text:style-name="Preformatted_20_Text"><text:span text:style-name="Source_20_Text">taskflow_celery <text:s text:c="3"/>: Celery async worker</text:span></text:p>
      <text:p text:style-name="Preformatted_20_Text"><text:span text:style-name="Source_20_Text">taskflow_frontend <text:s/>: React production build</text:span></text:p>
      <text:p text:style-name="P1"><text:span text:style-name="Source_20_Text">taskflow_nginx <text:s text:c="4"/>: Public reverse proxy on port 80</text:span></text:p>
      <text:p text:style-name="Horizontal_20_Line"/>
      <text:h text:style-name="Heading_20_1" text:outline-level="1">15. Final Deployment Flow</text:h>
      <text:p text:style-name="Preformatted_20_Text"><text:span text:style-name="Source_20_Text">User Browser</text:span></text:p>
      <text:p text:style-name="Preformatted_20_Text"><text:span text:style-name="Source_20_Text"><text:s text:c="4"/>↓</text:span></text:p>
      <text:p text:style-name="Preformatted_20_Text"><text:span text:style-name="Source_20_Text">EC2 Public IP on Port 80</text:span></text:p>
      <text:p text:style-name="Preformatted_20_Text"><text:span text:style-name="Source_20_Text"><text:s text:c="4"/>↓</text:span></text:p>
      <text:p text:style-name="Preformatted_20_Text"><text:span text:style-name="Source_20_Text">Nginx Container</text:span></text:p>
      <text:p text:style-name="Preformatted_20_Text"><text:span text:style-name="Source_20_Text"><text:s text:c="4"/>↓</text:span></text:p>
      <text:p text:style-name="Preformatted_20_Text"><text:span text:style-name="Source_20_Text">React Frontend / Django API / Django Admin</text:span></text:p>
      <text:p text:style-name="Preformatted_20_Text"><text:span text:style-name="Source_20_Text"><text:s text:c="4"/>↓</text:span></text:p>
      <text:p text:style-name="Preformatted_20_Text"><text:span text:style-name="Source_20_Text">Django Backend</text:span></text:p>
      <text:p text:style-name="Preformatted_20_Text"><text:span text:style-name="Source_20_Text"><text:s text:c="4"/>↓</text:span></text:p>
      <text:p text:style-name="P1"><text:span text:style-name="Source_20_Text">PostgreSQL + Redis + Celery</text:span></text:p>
      <text:p text:style-name="Horizontal_20_Line"/>
      <text:h text:style-name="Heading_20_1" text:outline-level="1">16. Final Verified URLs</text:h>
      <text:p text:style-name="Preformatted_20_Text"><text:span text:style-name="Source_20_Text">Frontend App : http://YOUR_EC2_PUBLIC_IP/</text:span></text:p>
      <text:p text:style-name="Preformatted_20_Text"><text:span text:style-name="Source_20_Text">Django Admin : http://YOUR_EC2_PUBLIC_IP/admin/</text:span></text:p>
      <text:p text:style-name="P1"><text:span text:style-name="Source_20_Text">Backend API <text:s/>: http://YOUR_EC2_PUBLIC_IP/api/</text:span></text:p>
      <text:h text:style-name="Heading_20_3" text:outline-level="3"><text:soft-page-break/>Verified</text:h>
      <text:p text:style-name="Preformatted_20_Text"><text:span text:style-name="Source_20_Text">Frontend opened successfully</text:span></text:p>
      <text:p text:style-name="Preformatted_20_Text"><text:span text:style-name="Source_20_Text">Admin login worked</text:span></text:p>
      <text:p text:style-name="Preformatted_20_Text"><text:span text:style-name="Source_20_Text">API login worked</text:span></text:p>
      <text:p text:style-name="Preformatted_20_Text"><text:span text:style-name="Source_20_Text">Nginx reverse proxy worked</text:span></text:p>
      <text:p text:style-name="P1"><text:span text:style-name="Source_20_Text">Docker Compose deployment worked</text:span></text:p>
      <text:p text:style-name="Horizontal_20_Line"/>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6T00:53:01.748155842</meta:creation-date>
    <dc:date>2026-05-16T10:39:08.129854210</dc:date>
    <meta:editing-duration>PT7H4M21S</meta:editing-duration>
    <meta:editing-cycles>11</meta:editing-cycles>
    <meta:generator>LibreOffice/24.2.7.2$Linux_X86_64 LibreOffice_project/420$Build-2</meta:generator>
    <meta:document-statistic meta:table-count="0" meta:image-count="0" meta:object-count="0" meta:page-count="72" meta:paragraph-count="2106" meta:word-count="7117" meta:character-count="52709" meta:non-whitespace-character-count="46081"/>
  </office:meta>
</office:document-meta>
</file>